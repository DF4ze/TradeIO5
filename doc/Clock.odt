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malisation de la Clock dans TradeIO</text:h>
      <text:h text:style-name="Heading_20_2" text:outline-level="2">1. Objectif</text:h>
      <text:p text:style-name="Text_20_body">Introduire une gestion <text:span text:style-name="Strong_20_Emphasis">centralisée, explicite et contrôlée du temps</text:span> afin de :</text:p>
      <text:list text:style-name="L1">
        <text:list-item>
          <text:p text:style-name="P1">Garantir la <text:span text:style-name="Strong_20_Emphasis">reproductibilité</text:span> (backtesting, simulations)</text:p>
        </text:list-item>
        <text:list-item>
          <text:p text:style-name="P1">Séparer clairement le <text:span text:style-name="Strong_20_Emphasis">temps métier</text:span> du <text:span text:style-name="Strong_20_Emphasis">temps système</text:span></text:p>
        </text:list-item>
        <text:list-item>
          <text:p text:style-name="P1">Éviter toute dépendance implicite à <text:span text:style-name="Source_20_Text">Instant.now()</text:span> dans la logique cœur</text:p>
        </text:list-item>
      </text:list>
      <text:p text:style-name="Horizontal_20_Line"/>
      <text:h text:style-name="Heading_20_2" text:outline-level="2">2. Principe fondamental</text:h>
      <text:p text:style-name="Quotations"><text:span text:style-name="Strong_20_Emphasis">Aucune logique métier ne doit appeler </text:span><text:span text:style-name="Strong_20_Emphasis"><text:span text:style-name="Source_20_Text">Instant.now()</text:span></text:span><text:span text:style-name="Strong_20_Emphasis"> directement.</text:span></text:p>
      <text:p text:style-name="Text_20_body">Le temps devient :</text:p>
      <text:list text:style-name="L2">
        <text:list-item>
          <text:p text:style-name="P2">soit <text:span text:style-name="Strong_20_Emphasis">injecté</text:span> (paramètre explicite)</text:p>
        </text:list-item>
        <text:list-item>
          <text:p text:style-name="P2">soit <text:span text:style-name="Strong_20_Emphasis">fourni par une Clock abstraite</text:span></text:p>
        </text:list-item>
      </text:list>
      <text:p text:style-name="Horizontal_20_Line"/>
      <text:h text:style-name="Heading_20_2" text:outline-level="2">3. Les deux notions de temps</text:h>
      <text:h text:style-name="Heading_20_3" text:outline-level="3">3.1 Temps métier (Domain Time)</text:h>
      <text:p text:style-name="Text_20_body">Utilisé pour :</text:p>
      <text:list text:style-name="L3">
        <text:list-item>
          <text:p text:style-name="P3">MarketDataset</text:p>
        </text:list-item>
        <text:list-item>
          <text:p text:style-name="P3">Decisions / DecisionContext</text:p>
        </text:list-item>
        <text:list-item>
          <text:p text:style-name="P3">Indicators</text:p>
        </text:list-item>
        <text:list-item>
          <text:p text:style-name="P3">Cache métier</text:p>
        </text:list-item>
        <text:list-item>
          <text:p text:style-name="P3">Backtesting</text:p>
        </text:list-item>
      </text:list>
      <text:p text:style-name="Text_20_body">➡️ Source : <text:span text:style-name="Strong_20_Emphasis"><text:span text:style-name="Source_20_Text">endTime</text:span></text:span><text:span text:style-name="Strong_20_Emphasis"> d’une requête</text:span> ou <text:span text:style-name="Strong_20_Emphasis">Clock métier</text:span></text:p>
      <text:h text:style-name="Heading_20_3" text:outline-level="3">3.2 Temps système (System Time)</text:h>
      <text:p text:style-name="Text_20_body">Utilisé pour :</text:p>
      <text:list text:style-name="L4">
        <text:list-item>
          <text:p text:style-name="P4">createdAt / updatedAt techniques</text:p>
        </text:list-item>
        <text:list-item>
          <text:p text:style-name="P4">audit</text:p>
        </text:list-item>
        <text:list-item>
          <text:p text:style-name="P4">logs</text:p>
        </text:list-item>
        <text:list-item>
          <text:p text:style-name="P4">initialisation applicative</text:p>
        </text:list-item>
      </text:list>
      <text:p text:style-name="Text_20_body"><text:soft-page-break/>➡️ Source : <text:span text:style-name="Source_20_Text">Clock.systemUTC()</text:span> ou équivalent</text:p>
      <text:p text:style-name="Horizontal_20_Line"/>
      <text:h text:style-name="Heading_20_2" text:outline-level="2">4. Interface Clock</text:h>
      <text:p text:style-name="Preformatted_20_Text"><text:span text:style-name="Source_20_Text">public interface DomainClock {</text:span></text:p>
      <text:p text:style-name="Preformatted_20_Text"><text:span text:style-name="Source_20_Text"><text:s text:c="4"/>Instant now();</text:span></text:p>
      <text:p text:style-name="P5"><text:span text:style-name="Source_20_Text">}</text:span></text:p>
      <text:p text:style-name="Horizontal_20_Line"/>
      <text:h text:style-name="Heading_20_2" text:outline-level="2">5. Implémentations</text:h>
      <text:h text:style-name="Heading_20_3" text:outline-level="3">5.1 Clock système (production)</text:h>
      <text:p text:style-name="Preformatted_20_Text"><text:span text:style-name="Source_20_Text">@Component</text:span></text:p>
      <text:p text:style-name="Preformatted_20_Text"><text:span text:style-name="Source_20_Text">public class SystemDomainClock implements DomainClock {</text:span></text:p>
      <text:p text:style-name="Preformatted_20_Text"><text:span text:style-name="Source_20_Text"><text:s text:c="4"/>@Override</text:span></text:p>
      <text:p text:style-name="Preformatted_20_Text"><text:span text:style-name="Source_20_Text"><text:s text:c="4"/>public Instant now() {</text:span></text:p>
      <text:p text:style-name="Preformatted_20_Text"><text:span text:style-name="Source_20_Text"><text:s text:c="8"/>return Instant.now()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Text_20_body">Usage :</text:p>
      <text:list text:style-name="L5">
        <text:list-item>
          <text:p text:style-name="P6">Live trading</text:p>
        </text:list-item>
        <text:list-item>
          <text:p text:style-name="P6">Execution temps réel</text:p>
        </text:list-item>
      </text:list>
      <text:p text:style-name="Horizontal_20_Line"/>
      <text:h text:style-name="Heading_20_3" text:outline-level="3">5.2 Clock figée (tests / backtesting)</text:h>
      <text:p text:style-name="Preformatted_20_Text"><text:span text:style-name="Source_20_Text">public class FixedDomainClock implements DomainClock {</text:span></text:p>
      <text:p text:style-name="Preformatted_20_Text"/>
      <text:p text:style-name="Preformatted_20_Text"><text:span text:style-name="Source_20_Text"><text:s text:c="4"/>private Instant current;</text:span></text:p>
      <text:p text:style-name="Preformatted_20_Text"/>
      <text:p text:style-name="Preformatted_20_Text"><text:span text:style-name="Source_20_Text"><text:s text:c="4"/>public FixedDomainClock(Instant start) {</text:span></text:p>
      <text:p text:style-name="Preformatted_20_Text"><text:span text:style-name="Source_20_Text"><text:s text:c="8"/>this.current = star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Instant now() {</text:span></text:p>
      <text:p text:style-name="Preformatted_20_Text"><text:span text:style-name="Source_20_Text"><text:s text:c="8"/>return curre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et(Instant instant) {</text:span></text:p>
      <text:p text:style-name="Preformatted_20_Text"><text:span text:style-name="Source_20_Text"><text:s text:c="8"/>this.current = insta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advance(Duration duration) {</text:span></text:p>
      <text:p text:style-name="Preformatted_20_Text"><text:span text:style-name="Source_20_Text"><text:s text:c="8"/>this.current = this.current.plus(duration)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2" text:outline-level="2"><text:soft-page-break/>6. Règles d’utilisation</text:h>
      <text:h text:style-name="Heading_20_3" text:outline-level="3">Règle 1 — Request first</text:h>
      <text:p text:style-name="Text_20_body">Si une méthode reçoit un <text:span text:style-name="Source_20_Text">Instant</text:span> explicite (ex: <text:span text:style-name="Source_20_Text">endTime</text:span>) :<text:line-break/>➡️ <text:span text:style-name="Strong_20_Emphasis">Il prime sur la Clock</text:span></text:p>
      <text:p text:style-name="P5"><text:span text:style-name="Source_20_Text">Instant now = request.endTime();</text:span></text:p>
      <text:p text:style-name="Horizontal_20_Line"/>
      <text:h text:style-name="Heading_20_3" text:outline-level="3">Règle 2 — Pas de now() caché</text:h>
      <text:p text:style-name="Text_20_body">❌ Mauvais :</text:p>
      <text:p text:style-name="P5"><text:span text:style-name="Source_20_Text">state.setLastUpdate(Instant.now());</text:span></text:p>
      <text:p text:style-name="Text_20_body">✅ Bon :</text:p>
      <text:p text:style-name="P5"><text:span text:style-name="Source_20_Text">state.setLastUpdate(now);</text:span></text:p>
      <text:p text:style-name="Horizontal_20_Line"/>
      <text:h text:style-name="Heading_20_3" text:outline-level="3">Règle 3 — Engine = point d’ancrage temporel</text:h>
      <text:p text:style-name="Text_20_body">Les Engines (MarketDatasetEngine, DecisionEngine, etc.) sont responsables de :</text:p>
      <text:list text:style-name="L6">
        <text:list-item>
          <text:p text:style-name="P7">déterminer le <text:span text:style-name="Strong_20_Emphasis">temps courant métier</text:span></text:p>
        </text:list-item>
        <text:list-item>
          <text:p text:style-name="P7">le propager à tous les composants appelés</text:p>
        </text:list-item>
      </text:list>
      <text:p text:style-name="Horizontal_20_Line"/>
      <text:h text:style-name="Heading_20_2" text:outline-level="2">7. Application aux composants existants</text:h>
      <text:h text:style-name="Heading_20_3" text:outline-level="3">MarketDatasetEngine</text:h>
      <text:list text:style-name="L7">
        <text:list-item>
          <text:p text:style-name="P8"><text:span text:style-name="Source_20_Text">now</text:span> = <text:span text:style-name="Source_20_Text">request.endTime()</text:span></text:p>
        </text:list-item>
        <text:list-item>
          <text:p text:style-name="P8">Aucun appel direct à la Clock</text:p>
        </text:list-item>
      </text:list>
      <text:h text:style-name="Heading_20_3" text:outline-level="3">MarketDatasetManager / State</text:h>
      <text:list text:style-name="L8">
        <text:list-item>
          <text:p text:style-name="P9">Reçoivent toujours un <text:span text:style-name="Source_20_Text">Instant providedNow</text:span></text:p>
        </text:list-item>
        <text:list-item>
          <text:p text:style-name="P9">Ne calculent jamais le temps eux-mêmes</text:p>
        </text:list-item>
      </text:list>
      <text:h text:style-name="Heading_20_3" text:outline-level="3">DecisionContext</text:h>
      <text:list text:style-name="L9">
        <text:list-item>
          <text:p text:style-name="P10">Doit <text:span text:style-name="Strong_20_Emphasis">toujours</text:span> contenir un <text:span text:style-name="Source_20_Text">Instant now</text:span></text:p>
        </text:list-item>
        <text:list-item>
          <text:p text:style-name="P10">Jamais de valeur par défaut implicite</text:p>
        </text:list-item>
      </text:list>
      <text:p text:style-name="Horizontal_20_Line"/>
      <text:h text:style-name="Heading_20_2" text:outline-level="2"><text:soft-page-break/>8. Tests unitaires</text:h>
      <text:list text:style-name="L10">
        <text:list-item>
          <text:p text:style-name="P11">Ne pas mocker le temps</text:p>
        </text:list-item>
        <text:list-item>
          <text:p text:style-name="P11">Utiliser une <text:span text:style-name="Source_20_Text">FixedDomainClock</text:span></text:p>
        </text:list-item>
        <text:list-item>
          <text:p text:style-name="P11">Avancer le temps explicitement</text:p>
        </text:list-item>
      </text:list>
      <text:p text:style-name="Text_20_body">➡️ Tests lisibles, déterministes, sans <text:span text:style-name="Source_20_Text">Thread.sleep()</text:span></text:p>
      <text:p text:style-name="Horizontal_20_Line"/>
      <text:h text:style-name="Heading_20_2" text:outline-level="2">9. Bénéfices obtenus</text:h>
      <text:list text:style-name="L11">
        <text:list-item>
          <text:p text:style-name="P12">Backtesting fiable</text:p>
        </text:list-item>
        <text:list-item>
          <text:p text:style-name="P12">Comparaison live / simulé possible</text:p>
        </text:list-item>
        <text:list-item>
          <text:p text:style-name="P12">Debug temporel simple</text:p>
        </text:list-item>
        <text:list-item>
          <text:p text:style-name="P12">Élimination d’une classe entière de bugs subtils</text:p>
        </text:list-item>
      </text:list>
      <text:p text:style-name="Horizontal_20_Line"/>
      <text:h text:style-name="Heading_20_2" text:outline-level="2">10. Étape suivante naturelle</text:h>
      <text:p text:style-name="Text_20_body">Une fois la Clock formalisée :</text:p>
      <text:list text:style-name="L12">
        <text:list-item>
          <text:p text:style-name="P13">Backtesting Engine</text:p>
        </text:list-item>
        <text:list-item>
          <text:p text:style-name="P13">Versionning config + résultats</text:p>
        </text:list-item>
        <text:list-item>
          <text:p text:style-name="P13">Métriques de performance (PnL, drawdown, etc.)</text:p>
        </text:list-item>
      </text:list>
      <text:p text:style-name="Text_20_body">➡️ La Clock est le <text:span text:style-name="Strong_20_Emphasis">socle</text:span> de tout le res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7:12:39.569870100</meta:creation-date>
    <dc:date>2026-01-25T17:13:09.725515100</dc:date>
    <meta:editing-duration>PT30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99" meta:word-count="428" meta:character-count="2845" meta:non-whitespace-character-count="2451"/>
  </office:meta>
</office:document-meta>
</file>