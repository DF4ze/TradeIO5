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0eb" officeooo:paragraph-rsid="0019c0eb"/>
    </style:style>
    <style:style style:name="P2" style:family="paragraph" style:parent-style-name="Standard">
      <style:text-properties officeooo:rsid="001babac" officeooo:paragraph-rsid="001ba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eurs : <text:line-break/><text:line-break/>- Flow ETF monte ou descend / Positif ou négatif</text:p>
      <text:p text:style-name="P1">- FearAndGreed : Regarder l’évolution : Si monte d’un coup : pas bon, il risque de retomber.</text:p>
      <text:p text:style-name="P1">- Valeur du Dollar : DXY</text:p>
      <text:p text:style-name="P1">- S&amp;P500</text:p>
      <text:p text:style-name="P1">- Zones de rejets</text:p>
      <text:p text:style-name="P1">- Zone de Liquidités</text:p>
      <text:p text:style-name="P1">- Market Cap des Stables coins =&gt; Injection liquidités</text:p>
      <text:p text:style-name="P1"/>
      <text:p text:style-name="P1"/>
      <text:p text:style-name="P2">Cryptolyze :</text:p>
      <text:p text:style-name="P2">- DXY</text:p>
      <text:p text:style-name="P2">- FearGreed</text:p>
      <text:p text:style-name="P2">- Liquidity</text:p>
      <text:p text:style-name="P2">- Market Volume</text:p>
      <text:p text:style-name="P2">- Nasdaq / SnP5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6:01:06.625089400</meta:creation-date>
    <dc:date>2026-01-25T12:14:02.653680100</dc:date>
    <meta:editing-duration>PT20H2M39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3" meta:word-count="69" meta:character-count="350" meta:non-whitespace-character-count="292"/>
  </office:meta>
</office:document-meta>
</file>