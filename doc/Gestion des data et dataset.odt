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le <text:span text:style-name="Strong_20_Emphasis">schéma logique d’imbrication</text:span> (responsabilités + flux), volontairement <text:span text:style-name="Strong_20_Emphasis">conceptuel</text:span> et lisible.</text:p>
      <text:p text:style-name="Horizontal_20_Line"/>
      <text:h text:style-name="Heading_20_2" text:outline-level="2">1️⃣ Noyau métier (données pures)</text:h>
      <text:p text:style-name="Preformatted_20_Text"><text:span text:style-name="Source_20_Text">MarketData</text:span></text:p>
      <text:p text:style-name="Preformatted_20_Text"><text:span text:style-name="Source_20_Text"><text:s text:c="3"/>↑</text:span></text:p>
      <text:p text:style-name="Preformatted_20_Text"><text:span text:style-name="Source_20_Text"><text:s text:c="3"/>│ (élément unitaire : candle / tick)</text:span></text:p>
      <text:p text:style-name="Preformatted_20_Text"><text:span text:style-name="Source_20_Text"><text:s text:c="3"/>│</text:span></text:p>
      <text:p text:style-name="Preformatted_20_Text"><text:span text:style-name="Source_20_Text">MarketDataset</text:span></text:p>
      <text:p text:style-name="Preformatted_20_Text"><text:span text:style-name="Source_20_Text"><text:s text:c="3"/>↑</text:span></text:p>
      <text:p text:style-name="Preformatted_20_Text"><text:span text:style-name="Source_20_Text"><text:s text:c="3"/>│ (snapshot IMMUTABLE)</text:span></text:p>
      <text:p text:style-name="Preformatted_20_Text"><text:span text:style-name="Source_20_Text"><text:s text:c="3"/>│</text:span></text:p>
      <text:p text:style-name="P1"><text:span text:style-name="Source_20_Text">MarketDatasetRequest</text:span></text:p>
      <text:h text:style-name="Heading_20_3" text:outline-level="3">Rôles</text:h>
      <text:list text:style-name="L1">
        <text:list-item>
          <text:p text:style-name="P2"><text:span text:style-name="Strong_20_Emphasis">MarketData</text:span></text:p>
          <text:list>
            <text:list-item>
              <text:p text:style-name="P2">une bougie / un point de marché</text:p>
            </text:list-item>
            <text:list-item>
              <text:p text:style-name="P2">totalement stateless</text:p>
            </text:list-item>
          </text:list>
        </text:list-item>
        <text:list-item>
          <text:p text:style-name="P2"><text:span text:style-name="Strong_20_Emphasis">MarketDataset</text:span></text:p>
          <text:list>
            <text:list-item>
              <text:p text:style-name="P2">vue figée à un instant T</text:p>
            </text:list-item>
            <text:list-item>
              <text:p text:style-name="P2">consommée par indicateurs / stratégies</text:p>
            </text:list-item>
            <text:list-item>
              <text:p text:style-name="P2">ne sait PAS comment elle a été construite</text:p>
            </text:list-item>
          </text:list>
        </text:list-item>
        <text:list-item>
          <text:p text:style-name="P2"><text:span text:style-name="Strong_20_Emphasis">MarketDatasetRequest</text:span></text:p>
          <text:list>
            <text:list-item>
              <text:p text:style-name="P2">clé fonctionnelle</text:p>
            </text:list-item>
            <text:list-item>
              <text:p text:style-name="P2">(symbol, timeframe, source)</text:p>
            </text:list-item>
            <text:list-item>
              <text:p text:style-name="P2">identifie <text:span text:style-name="Emphasis">un</text:span> dataset logique</text:p>
            </text:list-item>
          </text:list>
        </text:list-item>
      </text:list>
      <text:p text:style-name="Horizontal_20_Line"/>
      <text:h text:style-name="Heading_20_2" text:outline-level="2">2️⃣ État interne (invisible)</text:h>
      <text:p text:style-name="P1"><text:span text:style-name="Source_20_Text">MarketDatasetState</text:span></text:p>
      <text:h text:style-name="Heading_20_3" text:outline-level="3">Rôle</text:h>
      <text:list text:style-name="L2">
        <text:list-item>
          <text:p text:style-name="P3">buffer circulaire (<text:span text:style-name="Source_20_Text">Deque&lt;MarketData&gt;</text:span>)</text:p>
        </text:list-item>
        <text:list-item>
          <text:p text:style-name="P3">lastUpdate</text:p>
        </text:list-item>
        <text:list-item>
          <text:p text:style-name="P3">complete</text:p>
        </text:list-item>
        <text:list-item>
          <text:p text:style-name="P3"><text:span text:style-name="Strong_20_Emphasis">mutable</text:span></text:p>
        </text:list-item>
        <text:list-item>
          <text:p text:style-name="P3">jamais exposé hors du module dataset</text:p>
        </text:list-item>
      </text:list>
      <text:p text:style-name="Text_20_body"><text:soft-page-break/>👉 C’est <text:span text:style-name="Strong_20_Emphasis">la vérité vivante</text:span>, jamais consommée directement.</text:p>
      <text:p text:style-name="Horizontal_20_Line"/>
      <text:h text:style-name="Heading_20_2" text:outline-level="2">3️⃣ Services techniques (responsabilités claires)</text:h>
      <text:h text:style-name="Heading_20_3" text:outline-level="3">Cache</text:h>
      <text:p text:style-name="Preformatted_20_Text"><text:span text:style-name="Source_20_Text">MarketDatasetCache</text:span></text:p>
      <text:p text:style-name="P1"><text:span text:style-name="Source_20_Text"><text:s text:c="3"/>└── Map&lt;MarketDatasetRequest, MarketDatasetState&gt;</text:span></text:p>
      <text:list text:style-name="L3">
        <text:list-item>
          <text:p text:style-name="P4">gestion du cycle de vie</text:p>
        </text:list-item>
        <text:list-item>
          <text:p text:style-name="P4">création lazy</text:p>
        </text:list-item>
        <text:list-item>
          <text:p text:style-name="P4">thread-safe</text:p>
        </text:list-item>
        <text:list-item>
          <text:p text:style-name="P4"><text:span text:style-name="Strong_20_Emphasis">aucune logique métier</text:span></text:p>
        </text:list-item>
      </text:list>
      <text:p text:style-name="Horizontal_20_Line"/>
      <text:h text:style-name="Heading_20_3" text:outline-level="3">Manager (cerveau)</text:h>
      <text:p text:style-name="Preformatted_20_Text"><text:span text:style-name="Source_20_Text">MarketDatasetManager</text:span></text:p>
      <text:p text:style-name="Preformatted_20_Text"><text:span text:style-name="Source_20_Text"><text:s text:c="3"/>├── merge(...)</text:span></text:p>
      <text:p text:style-name="Preformatted_20_Text"><text:span text:style-name="Source_20_Text"><text:s text:c="3"/>├── detectGaps(...)</text:span></text:p>
      <text:p text:style-name="Preformatted_20_Text"><text:span text:style-name="Source_20_Text"><text:s text:c="3"/>├── updateCompleteness(...)</text:span></text:p>
      <text:p text:style-name="P1"><text:span text:style-name="Source_20_Text"><text:s text:c="3"/>└── snapshot(...)</text:span></text:p>
      <text:list text:style-name="L4">
        <text:list-item>
          <text:p text:style-name="P5">seule classe autorisée à :</text:p>
          <text:list>
            <text:list-item>
              <text:p text:style-name="P5">modifier <text:span text:style-name="Source_20_Text">MarketDatasetState</text:span></text:p>
            </text:list-item>
            <text:list-item>
              <text:p text:style-name="P5">décider si un dataset est complet</text:p>
            </text:list-item>
          </text:list>
        </text:list-item>
        <text:list-item>
          <text:p text:style-name="P5">100 % testable sans API</text:p>
        </text:list-item>
      </text:list>
      <text:p text:style-name="Horizontal_20_Line"/>
      <text:h text:style-name="Heading_20_3" text:outline-level="3">Provider (entrée monde extérieur)</text:h>
      <text:p text:style-name="Preformatted_20_Text"><text:span text:style-name="Source_20_Text">MarketDatasetProvider</text:span></text:p>
      <text:p text:style-name="P1"><text:span text:style-name="Source_20_Text"><text:s text:c="3"/>└── fetchMarketData(...)</text:span></text:p>
      <text:list text:style-name="L5">
        <text:list-item>
          <text:p text:style-name="P6">abstraction exchange / DEX / oracle</text:p>
        </text:list-item>
        <text:list-item>
          <text:p text:style-name="P6">stateless</text:p>
        </text:list-item>
        <text:list-item>
          <text:p text:style-name="P6">peut être multiple (Binance, Kraken…)</text:p>
        </text:list-item>
      </text:list>
      <text:p text:style-name="Horizontal_20_Line"/>
      <text:h text:style-name="Heading_20_2" text:outline-level="2">4️⃣ Engine (orchestration)</text:h>
      <text:p text:style-name="Preformatted_20_Text"><text:span text:style-name="Source_20_Text">MarketDatasetEngine (interface)</text:span></text:p>
      <text:p text:style-name="Preformatted_20_Text"><text:span text:style-name="Source_20_Text"><text:s text:c="3"/>├── getDataset(request)</text:span></text:p>
      <text:p text:style-name="Preformatted_20_Text"><text:span text:style-name="Source_20_Text"><text:s text:c="3"/>└── refresh(request)</text:span></text:p>
      <text:p text:style-name="Preformatted_20_Text"/>
      <text:p text:style-name="Preformatted_20_Text"><text:span text:style-name="Source_20_Text"><text:s text:c="11"/>▲</text:span></text:p>
      <text:p text:style-name="Preformatted_20_Text"><text:soft-page-break/><text:span text:style-name="Source_20_Text"><text:s text:c="11"/>│</text:span></text:p>
      <text:p text:style-name="P1"><text:span text:style-name="Source_20_Text">DefaultMarketDatasetEngine</text:span></text:p>
      <text:h text:style-name="Heading_20_3" text:outline-level="3">Rôle</text:h>
      <text:list text:style-name="L6">
        <text:list-item>
          <text:p text:style-name="P7">relie <text:span text:style-name="Strong_20_Emphasis">Provider → Manager → Cache</text:span></text:p>
        </text:list-item>
        <text:list-item>
          <text:p text:style-name="P7">garantit la cohérence</text:p>
        </text:list-item>
        <text:list-item>
          <text:p text:style-name="P7">ne contient aucune règle métier complexe</text:p>
        </text:list-item>
        <text:list-item>
          <text:p text:style-name="P7">point d’entrée unique du système</text:p>
        </text:list-item>
      </text:list>
      <text:p text:style-name="Horizontal_20_Line"/>
      <text:h text:style-name="Heading_20_2" text:outline-level="2">5️⃣ Flux d’exécution (lecture)</text:h>
      <text:p text:style-name="Preformatted_20_Text"><text:span text:style-name="Source_20_Text">Strategy / Indicator</text:span></text:p>
      <text:p text:style-name="Preformatted_20_Text"><text:span text:style-name="Source_20_Text"><text:s text:c="8"/>↓</text:span></text:p>
      <text:p text:style-name="Preformatted_20_Text"><text:span text:style-name="Source_20_Text">MarketDatasetEngine.getDataset(request)</text:span></text:p>
      <text:p text:style-name="Preformatted_20_Text"><text:span text:style-name="Source_20_Text"><text:s text:c="8"/>↓</text:span></text:p>
      <text:p text:style-name="Preformatted_20_Text"><text:span text:style-name="Source_20_Text">MarketDatasetCache.getState(request)</text:span></text:p>
      <text:p text:style-name="Preformatted_20_Text"><text:span text:style-name="Source_20_Text"><text:s text:c="8"/>↓</text:span></text:p>
      <text:p text:style-name="Preformatted_20_Text"><text:span text:style-name="Source_20_Text">[si incomplet]</text:span></text:p>
      <text:p text:style-name="Preformatted_20_Text"><text:span text:style-name="Source_20_Text"><text:s text:c="4"/>Provider.fetch(...)</text:span></text:p>
      <text:p text:style-name="Preformatted_20_Text"><text:span text:style-name="Source_20_Text"><text:s text:c="8"/>↓</text:span></text:p>
      <text:p text:style-name="Preformatted_20_Text"><text:span text:style-name="Source_20_Text"><text:s text:c="4"/>Manager.merge(state)</text:span></text:p>
      <text:p text:style-name="Preformatted_20_Text"><text:span text:style-name="Source_20_Text"><text:s text:c="8"/>↓</text:span></text:p>
      <text:p text:style-name="Preformatted_20_Text"><text:span text:style-name="Source_20_Text">Manager.snapshot(state)</text:span></text:p>
      <text:p text:style-name="Preformatted_20_Text"><text:span text:style-name="Source_20_Text"><text:s text:c="8"/>↓</text:span></text:p>
      <text:p text:style-name="P1"><text:span text:style-name="Source_20_Text">MarketDataset (IMMUTABLE)</text:span></text:p>
      <text:p text:style-name="Horizontal_20_Line"/>
      <text:h text:style-name="Heading_20_2" text:outline-level="2">6️⃣ Résumé en une phrase</text:h>
      <text:p text:style-name="Quotations"><text:span text:style-name="Strong_20_Emphasis">Le Dataset est une photo,<text:line-break/>le State est le film,<text:line-break/>le Manager monte le film,<text:line-break/>le Provider filme,<text:line-break/>l’Engine orchestre,<text:line-break/>le Cache se souvient.</text:span></text:p>
      <text:p text:style-name="Horizontal_20_Line"/>
      <text:h text:style-name="Heading_20_3" text:outline-level="3">Anecdote</text:h>
      <text:p text:style-name="Text_20_body">Dans les systèmes de trading “qui tiennent”, <text:span text:style-name="Strong_20_Emphasis">aucune stratégie ne sait d’où vient la donnée</text:span>.<text:line-break/>Quand tu peux changer Binance par un replay CSV sans toucher une ligne de stratégie…<text:line-break/>c’est que ton architecture est saine 😉</text:p>
      <text:p text:style-name="Text_20_body">👉 Prochaine brique naturelle :<text:line-break/><text:span text:style-name="Strong_20_Emphasis">définir précisément les règles de </text:span><text:span text:style-name="Strong_20_Emphasis"><text:span text:style-name="Source_20_Text">complete</text:span></text:span><text:span text:style-name="Strong_20_Emphasis"> par timeframe (marchés ouverts / fermés)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2:24:34.189376100</meta:creation-date>
    <dc:date>2026-01-12T12:25:22.032615700</dc:date>
    <meta:editing-duration>PT47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88" meta:word-count="340" meta:character-count="2411" meta:non-whitespace-character-count="2070"/>
  </office:meta>
</office:document-meta>
</file>