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🎯 <text:span text:style-name="Strong_20_Emphasis">Objectif de TradeIO</text:span></text:h>
      <text:p text:style-name="Text_20_body">Développer un <text:span text:style-name="Strong_20_Emphasis">bot de trading crypto</text:span> en <text:span text:style-name="Strong_20_Emphasis">Java Spring Boot</text:span>, capable de gérer des stratégies automatisées, multi-utilisateurs, et connecté à différents exchanges ou wallets.</text:p>
      <text:p text:style-name="Horizontal_20_Line"/>
      <text:h text:style-name="Heading_20_3" text:outline-level="3">🧠 <text:span text:style-name="Strong_20_Emphasis">Stratégies principales intégrées</text:span></text:h>
      <text:h text:style-name="Heading_20_4" text:outline-level="4">1. <text:span text:style-name="Strong_20_Emphasis">Gridbot avec Trailing Stop</text:span></text:h>
      <text:list text:style-name="L1">
        <text:list-item>
          <text:p text:style-name="P1">Achats déclenchés quand le prix passe sous un seuil</text:p>
        </text:list-item>
        <text:list-item>
          <text:p text:style-name="P1">Ventes déclenchées au-dessus d’un seuil</text:p>
        </text:list-item>
        <text:list-item>
          <text:p text:style-name="P1">Trailing stop appliqué à l'achat et à la vente</text:p>
          <text:list>
            <text:list-item>
              <text:p text:style-name="P1">Delta configurable (ex. 0,5 %)</text:p>
            </text:list-item>
            <text:list-item>
              <text:p text:style-name="P1">Peut évoluer avec le temps ou la volatilité</text:p>
            </text:list-item>
          </text:list>
        </text:list-item>
      </text:list>
      <text:h text:style-name="Heading_20_4" text:outline-level="4">2. <text:span text:style-name="Strong_20_Emphasis">DCA intelligent</text:span></text:h>
      <text:list text:style-name="L2">
        <text:list-item>
          <text:p text:style-name="P2">Achat périodique (ex. 25 €/semaine)</text:p>
        </text:list-item>
        <text:list-item>
          <text:p text:style-name="P2">Ajustement en fonction d’indicateurs (RSI, Rainbow Chart…)</text:p>
        </text:list-item>
        <text:list-item>
          <text:p text:style-name="P2">Augmentation de l’achat en cas de sous-cotation</text:p>
        </text:list-item>
        <text:list-item>
          <text:p text:style-name="P2">Diminution (voire vente) en cas de surcotation</text:p>
        </text:list-item>
      </text:list>
      <text:p text:style-name="Horizontal_20_Line"/>
      <text:h text:style-name="Heading_20_3" text:outline-level="3">⚙️ <text:span text:style-name="Strong_20_Emphasis">Autres fonctionnalités prévues</text:span></text:h>
      <text:list text:style-name="L3">
        <text:list-item>
          <text:p text:style-name="P3">Rééquilibrage automatique du portefeuille selon une pondération cible</text:p>
        </text:list-item>
        <text:list-item>
          <text:p text:style-name="P3">Mode “Crash Recovery” :</text:p>
          <text:list>
            <text:list-item>
              <text:p text:style-name="P3">Détection de chute brutale (ex. -15%/24h)</text:p>
            </text:list-item>
            <text:list-item>
              <text:p text:style-name="P3">Actions spécifiques (renforcement ou pause)</text:p>
            </text:list-item>
          </text:list>
        </text:list-item>
        <text:list-item>
          <text:p text:style-name="P3">Journalisation intelligente (JSON, CSV, Email)</text:p>
        </text:list-item>
        <text:list-item>
          <text:p text:style-name="P3">Rapports réguliers sur les investissements</text:p>
        </text:list-item>
        <text:list-item>
          <text:p text:style-name="P3">Alerte en cas de variation brutale de prix</text:p>
        </text:list-item>
        <text:list-item>
          <text:p text:style-name="P3">Transfert d’un % des profits vers une adresse externe (Ledger)</text:p>
        </text:list-item>
      </text:list>
      <text:p text:style-name="Horizontal_20_Line"/>
      <text:h text:style-name="Heading_20_3" text:outline-level="3">👥 <text:span text:style-name="Strong_20_Emphasis">Multi-utilisateurs</text:span></text:h>
      <text:list text:style-name="L4">
        <text:list-item>
          <text:p text:style-name="P4">Chaque utilisateur a son propre portefeuille</text:p>
        </text:list-item>
        <text:list-item>
          <text:p text:style-name="P4">Bot potentiellement monétisé via % des transactions</text:p>
        </text:list-item>
        <text:list-item>
          <text:p text:style-name="P4">Gestion des profils via base MySQL</text:p>
        </text:list-item>
        <text:list-item>
          <text:p text:style-name="P4"><text:soft-page-break/>Gestion des erreurs si aucun profil actif défini</text:p>
        </text:list-item>
      </text:list>
      <text:p text:style-name="Horizontal_20_Line"/>
      <text:h text:style-name="Heading_20_3" text:outline-level="3">🔗 <text:span text:style-name="Strong_20_Emphasis">Intégration</text:span></text:h>
      <text:list text:style-name="L5">
        <text:list-item>
          <text:p text:style-name="P5">Exchanges : Binance, Kraken, Crypto.com</text:p>
        </text:list-item>
        <text:list-item>
          <text:p text:style-name="P5">Wallets : Metamask, Ledger</text:p>
        </text:list-item>
        <text:list-item>
          <text:p text:style-name="P5">Utilisation de Lombok, Thymeleaf, Bootstrap, jQuery</text:p>
        </text:list-item>
        <text:list-item>
          <text:p text:style-name="P5"><text:span text:style-name="Source_20_Text">application.properties</text:span> (pas YAML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<text:span text:style-name="Strong_20_Emphasis">Ce qui est déjà en place</text:span> :</text:h>
      <text:list text:style-name="L6">
        <text:list-item>
          <text:p text:style-name="P6">✅ Application <text:span text:style-name="Strong_20_Emphasis">Java Spring Boot</text:span> avec <text:span text:style-name="Strong_20_Emphasis">Thymeleaf</text:span>, Bootstrap, jQuery.</text:p>
        </text:list-item>
        <text:list-item>
          <text:p text:style-name="P6">✅ Fichier <text:span text:style-name="Source_20_Text">application.properties</text:span> (et non YAML), gestion des profils (<text:span text:style-name="Source_20_Text">dev</text:span>, <text:span text:style-name="Source_20_Text">prod</text:span>, etc.).</text:p>
        </text:list-item>
        <text:list-item>
          <text:p text:style-name="P6">✅ Base de données <text:span text:style-name="Strong_20_Emphasis">MySQL</text:span> fonctionnelle.</text:p>
        </text:list-item>
        <text:list-item>
          <text:p text:style-name="P6">✅ Gestion des utilisateurs (<text:span text:style-name="Source_20_Text">User</text:span>), avec multi-wallet (<text:span text:style-name="Source_20_Text">Wallet</text:span>), sources (<text:span text:style-name="Source_20_Text">WalletSource</text:span>), et un système multi-utilisateur prévu.</text:p>
        </text:list-item>
        <text:list-item>
          <text:p text:style-name="P6">✅ L’application s’arrête proprement si aucun profil n’est défini.</text:p>
        </text:list-item>
        <text:list-item>
          <text:p text:style-name="P6">✅ Lombok utilisé.</text:p>
        </text:list-item>
      </text:list>
      <text:p text:style-name="Horizontal_20_Line"/>
      <text:h text:style-name="Heading_20_3" text:outline-level="3">🧠 <text:span text:style-name="Strong_20_Emphasis">Modules/fonctionnalités déjà définis (mais pas forcément codés)</text:span> :</text:h>
      <text:h text:style-name="Heading_20_4" text:outline-level="4">🎯 1. <text:span text:style-name="Strong_20_Emphasis">Gridbot avec Trailing Stop</text:span></text:h>
      <text:list text:style-name="L7">
        <text:list-item>
          <text:p text:style-name="P7">Achats/ventes selon une grille.</text:p>
        </text:list-item>
        <text:list-item>
          <text:p text:style-name="P7">Déclenchement basé sur un <text:span text:style-name="Strong_20_Emphasis">trailing stop intelligent</text:span>.</text:p>
        </text:list-item>
        <text:list-item>
          <text:p text:style-name="P7">Espacement des lignes calculé dynamiquement au lancement.</text:p>
        </text:list-item>
        <text:list-item>
          <text:p text:style-name="P7">Mise en pause si le prix sort de la grille.</text:p>
        </text:list-item>
      </text:list>
      <text:h text:style-name="Heading_20_4" text:outline-level="4">📉 2. <text:span text:style-name="Strong_20_Emphasis">DCA intelligent</text:span></text:h>
      <text:list text:style-name="L8">
        <text:list-item>
          <text:p text:style-name="P8">Achat périodique (ex. 25 €/semaine).</text:p>
        </text:list-item>
        <text:list-item>
          <text:p text:style-name="P8">Montant modulé selon indicateurs comme <text:span text:style-name="Strong_20_Emphasis">RSI</text:span> ou <text:span text:style-name="Strong_20_Emphasis">Rainbow Chart</text:span>.</text:p>
        </text:list-item>
        <text:list-item>
          <text:p text:style-name="P8">Capacité à diminuer ou suspendre les achats si l’actif est surcoté.</text:p>
        </text:list-item>
      </text:list>
      <text:h text:style-name="Heading_20_4" text:outline-level="4"><text:soft-page-break/>🛑 3. <text:span text:style-name="Strong_20_Emphasis">Trailing Stop autonome</text:span></text:h>
      <text:list text:style-name="L9">
        <text:list-item>
          <text:p text:style-name="P9">Delta ajustable selon la volatilité.</text:p>
        </text:list-item>
        <text:list-item>
          <text:p text:style-name="P9">Plus strict en cas de stagnation.</text:p>
        </text:list-item>
        <text:list-item>
          <text:p text:style-name="P9">Déclenche un ordre marché à -0,5 % de retournement.</text:p>
        </text:list-item>
      </text:list>
      <text:h text:style-name="Heading_20_4" text:outline-level="4">⚖️ 4. <text:span text:style-name="Strong_20_Emphasis">Rééquilibrage automatique du portefeuille</text:span></text:h>
      <text:list text:style-name="L10">
        <text:list-item>
          <text:p text:style-name="P10">Ex : 40%-30%-30%.</text:p>
        </text:list-item>
        <text:list-item>
          <text:p text:style-name="P10">Ajustement progressif par rapport à une pondération cible.</text:p>
        </text:list-item>
      </text:list>
      <text:h text:style-name="Heading_20_4" text:outline-level="4">📉 5. <text:span text:style-name="Strong_20_Emphasis">Mode Crash Recovery</text:span></text:h>
      <text:list text:style-name="L11">
        <text:list-item>
          <text:p text:style-name="P11">Détection de chute brutale (ex. -15% / 24h).</text:p>
        </text:list-item>
        <text:list-item>
          <text:p text:style-name="P11">Réaction : soit achat agressif, soit suspension des actions.</text:p>
        </text:list-item>
      </text:list>
      <text:h text:style-name="Heading_20_4" text:outline-level="4">📊 6. <text:span text:style-name="Strong_20_Emphasis">Journalisation &amp; rapports</text:span></text:h>
      <text:list text:style-name="L12">
        <text:list-item>
          <text:p text:style-name="P12">Historique des actions.</text:p>
        </text:list-item>
        <text:list-item>
          <text:p text:style-name="P12">Suivi des investissements.</text:p>
        </text:list-item>
        <text:list-item>
          <text:p text:style-name="P12">Exports JSON/CSV hebdo.</text:p>
        </text:list-item>
      </text:list>
      <text:h text:style-name="Heading_20_4" text:outline-level="4">🔔 7. <text:span text:style-name="Strong_20_Emphasis">Système d’alertes</text:span></text:h>
      <text:list text:style-name="L13">
        <text:list-item>
          <text:p text:style-name="P13">Hausse ou baisse brutale de prix.</text:p>
        </text:list-item>
      </text:list>
      <text:h text:style-name="Heading_20_4" text:outline-level="4">🔁 8. <text:span text:style-name="Strong_20_Emphasis">Exécution en parallèle</text:span></text:h>
      <text:list text:style-name="L14">
        <text:list-item>
          <text:p text:style-name="P14">Tous les modules fonctionnent indépendamment (DCA, Grid, Alertes...).</text:p>
        </text:list-item>
      </text:list>
      <text:h text:style-name="Heading_20_4" text:outline-level="4">🔄 9. <text:span text:style-name="Strong_20_Emphasis">Transfert d'une partie des profits</text:span></text:h>
      <text:list text:style-name="L15">
        <text:list-item>
          <text:p text:style-name="P15">Vers un wallet externe (ex. Ledger) selon un pourcentag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6:00:33.677726200</meta:creation-date>
    <dc:date>2025-08-06T16:04:03.064670700</dc:date>
    <meta:editing-duration>PT3M29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70" meta:word-count="508" meta:character-count="3109" meta:non-whitespace-character-count="2722"/>
  </office:meta>
</office:document-meta>
</file>