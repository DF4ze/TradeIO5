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fc648"/>
    </style:style>
    <style:style style:name="T2" style:family="text">
      <style:text-properties officeooo:rsid="001ef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rading :</text:span><text:line-break/>- <text:span text:style-name="T2">InteractiveBrokers : Trade d’action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1:58:01.597083700</meta:creation-date>
    <dc:date>2026-02-05T22:13:10.137725900</dc:date>
    <meta:editing-duration>PT4M54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" meta:word-count="7" meta:character-count="48" meta:non-whitespace-character-count="42"/>
  </office:meta>
</office:document-meta>
</file>