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Organisation proposée – couche <text:span text:style-name="Strong_20_Emphasis">Decision</text:span></text:h>
      <text:p text:style-name="Text_20_body"><text:span text:style-name="Strong_20_Emphasis">Vue d’ensemble (schéma logique)</text:span></text:p>
      <text:p text:style-name="P1"><text:span text:style-name="Source_20_Text">DecisionEngine</text:span></text:p>
      <text:p text:style-name="P2"><text:span text:style-name="Source_20_Text"><text:s text:c="3"/>└── DecisionRegistry</text:span></text:p>
      <text:p text:style-name="P2"><text:span text:style-name="Source_20_Text"><text:s text:c="11"/>└── Decision (interface)</text:span></text:p>
      <text:p text:style-name="P2"><text:span text:style-name="Source_20_Text"><text:s text:c="17"/>└── AbstractDecision (optionnel)</text:span></text:p>
      <text:p text:style-name="P2"><text:span text:style-name="Source_20_Text"><text:s text:c="24"/>└── ConcreteDecision(s)</text:span></text:p>
      <text:p text:style-name="P2"><text:span text:style-name="Source_20_Text"><text:s text:c="31"/>└── List&lt;Strategy&gt;</text:span></text:p>
      <text:p text:style-name="P3"><text:span text:style-name="Source_20_Text"><text:s text:c="38"/>└── StrategyEngine / Strategy</text:span></text:p>
      <text:p text:style-name="Horizontal_20_Line"/>
      <text:h text:style-name="Heading_20_3" text:outline-level="3">Description des classes</text:h>
      <text:p text:style-name="Text_20_body"><text:span text:style-name="Strong_20_Emphasis">DecisionEngine</text:span><text:line-break/>Point d’entrée de la couche Decision.</text:p>
      <text:list text:style-name="L1">
        <text:list-item>
          <text:p text:style-name="P4">Reçoit le <text:span text:style-name="Strong_20_Emphasis">DecisionContext</text:span> + <text:span text:style-name="Strong_20_Emphasis">DecisionParameters</text:span> génériques</text:p>
        </text:list-item>
        <text:list-item>
          <text:p text:style-name="P4">Enrichit le contexte (wallet, profil user, risk, mode exit, renforcement…)</text:p>
        </text:list-item>
        <text:list-item>
          <text:p text:style-name="P4">Sélectionne et exécute une ou plusieurs Decision via le registry</text:p>
        </text:list-item>
      </text:list>
      <text:p text:style-name="Horizontal_20_Line"/>
      <text:p text:style-name="Text_20_body"><text:span text:style-name="Strong_20_Emphasis">DecisionRegistry</text:span><text:line-break/>Registre central des décisions disponibles.</text:p>
      <text:list text:style-name="L2">
        <text:list-item>
          <text:p text:style-name="P5">Lookup par <text:span text:style-name="Source_20_Text">DecisionType</text:span></text:p>
        </text:list-item>
        <text:list-item>
          <text:p text:style-name="P5">Permet d’activer plusieurs décisions en parallèle</text:p>
        </text:list-item>
        <text:list-item>
          <text:p text:style-name="P5">Découple le moteur des implémentations concrètes</text:p>
        </text:list-item>
      </text:list>
      <text:p text:style-name="Horizontal_20_Line"/>
      <text:p text:style-name="Text_20_body"><text:span text:style-name="Strong_20_Emphasis">Decision (interface)</text:span><text:line-break/>Contrat commun à toutes les décisions.</text:p>
      <text:list text:style-name="L3">
        <text:list-item>
          <text:p text:style-name="P6">Déclare la méthode <text:span text:style-name="Source_20_Text">evaluate(...)</text:span> ou <text:span text:style-name="Source_20_Text">decide(...)</text:span></text:p>
        </text:list-item>
        <text:list-item>
          <text:p text:style-name="P6">Ne contient aucune logique technique (orchestration uniquement)</text:p>
        </text:list-item>
      </text:list>
      <text:p text:style-name="Horizontal_20_Line"/>
      <text:p text:style-name="Text_20_body"><text:span text:style-name="Strong_20_Emphasis">AbstractDecision (optionnelle mais recommandée)</text:span><text:line-break/>Base commune aux décisions.</text:p>
      <text:list text:style-name="L4">
        <text:list-item>
          <text:p text:style-name="P7">Gestion de la liste de <text:span text:style-name="Source_20_Text">Strategy</text:span></text:p>
        </text:list-item>
        <text:list-item>
          <text:p text:style-name="P7">Méthodes utilitaires (filtrage, agrégation de signaux…)</text:p>
        </text:list-item>
        <text:list-item>
          <text:p text:style-name="P7">Évite la duplication entre décisions</text:p>
        </text:list-item>
      </text:list>
      <text:p text:style-name="Horizontal_20_Line"/>
      <text:p text:style-name="Text_20_body"><text:span text:style-name="Strong_20_Emphasis">ConcreteDecision (ex : RiskDecision, ExitMarketDecision…)</text:span><text:line-break/>Implémentation métier réelle.</text:p>
      <text:list text:style-name="L5">
        <text:list-item>
          <text:p text:style-name="P8"><text:soft-page-break/>Définit quelles stratégies sont utilisées</text:p>
        </text:list-item>
        <text:list-item>
          <text:p text:style-name="P8">Interprète leurs signaux pour produire une <text:span text:style-name="Strong_20_Emphasis">DecisionResult</text:span></text:p>
        </text:list-item>
        <text:list-item>
          <text:p text:style-name="P8">Ne connaît pas le moteur</text:p>
        </text:list-item>
      </text:list>
      <text:p text:style-name="Horizontal_20_Line"/>
      <text:p text:style-name="Text_20_body"><text:span text:style-name="Strong_20_Emphasis">Strategy</text:span><text:line-break/>Déjà existant.</text:p>
      <text:list text:style-name="L6">
        <text:list-item>
          <text:p text:style-name="P9">Une Decision peut en agréger plusieurs</text:p>
        </text:list-item>
        <text:list-item>
          <text:p text:style-name="P9">La Decision orchestre, la Strategy calcule</text:p>
        </text:list-item>
      </text:list>
      <text:p text:style-name="Horizontal_20_Line"/>
      <text:p text:style-name="Text_20_body"><text:span text:style-name="Strong_20_Emphasis">DecisionContext</text:span><text:line-break/>Contexte enrichi côté Decision.</text:p>
      <text:list text:style-name="L7">
        <text:list-item>
          <text:p text:style-name="P10">MarketContext</text:p>
        </text:list-item>
        <text:list-item>
          <text:p text:style-name="P10">WalletSnapshot</text:p>
        </text:list-item>
        <text:list-item>
          <text:p text:style-name="P10">UserProfile (risk, objectifs…)</text:p>
        </text:list-item>
        <text:list-item>
          <text:p text:style-name="P10">États globaux (exiting market, renforcement actif…)</text:p>
        </text:list-item>
      </text:list>
      <text:p text:style-name="Horizontal_20_Line"/>
      <text:p text:style-name="Text_20_body"><text:span text:style-name="Strong_20_Emphasis">DecisionParameters</text:span><text:line-break/>Paramètres génériques et configurables.</text:p>
      <text:list text:style-name="L8">
        <text:list-item>
          <text:p text:style-name="P11">Seuils</text:p>
        </text:list-item>
        <text:list-item>
          <text:p text:style-name="P11">Modes d’exécution</text:p>
        </text:list-item>
        <text:list-item>
          <text:p text:style-name="P11">Overrides user / strategy</text:p>
        </text:list-item>
      </text:list>
      <text:p text:style-name="Horizontal_20_Line"/>
      <text:p text:style-name="Text_20_body"><text:span text:style-name="Strong_20_Emphasis">DecisionResult</text:span><text:line-break/>Résultat d’une décision.</text:p>
      <text:list text:style-name="L9">
        <text:list-item>
          <text:p text:style-name="P12">Actions proposées (BUY / SELL / HOLD / ADJUST)</text:p>
        </text:list-item>
        <text:list-item>
          <text:p text:style-name="P12">Niveau de confiance / priorité</text:p>
        </text:list-item>
        <text:list-item>
          <text:p text:style-name="P12">Métadonnées (quelle stratégie a pesé)</text:p>
        </text:list-item>
      </text:list>
      <text:p text:style-name="Horizontal_20_Line"/>
      <text:p text:style-name="Text_20_body">👉 Cette organisation garde <text:span text:style-name="Strong_20_Emphasis">exactement la même philosophie</text:span> que Indicator / Strategy :<text:line-break/>contrats clairs, registry, moteur d’orchestration, logique métier isolée.</text:p>
      <text:p text:style-name="Text_20_body"><text:span text:style-name="Strong_20_Emphasis">Anecdote</text:span><text:line-break/>Sur certains bots pro, la couche “Decision” est souvent ajoutée trop tard… et finit par devenir un gros <text:span text:style-name="Source_20_Text">if/else</text:span>. Là, tu poses directement une vraie couche d’orchestration propre — très bon réflexe.</text:p>
      <text:p text:style-name="Standard"/>
      <text:p text:style-name="Standard"><text:soft-page-break/>### Synthèse</text:p>
      <text:p text:style-name="Standard"/>
      <text:p text:style-name="Standard">Je verrais la structure comme **un système nerveux** :</text:p>
      <text:p text:style-name="Standard"/>
      <text:p text:style-name="Standard">* les **indicateurs** perçoivent</text:p>
      <text:p text:style-name="Standard">* les **stratégies** interprètent</text:p>
      <text:p text:style-name="Standard">* le **moteur de décision** arbitre</text:p>
      <text:p text:style-name="Standard">* l’**exécution** agit (ou s’abstient)</text:p>
      <text:p text:style-name="Standard"/>
      <text:p text:style-name="Standard">L’objectif n’est pas de “trouver le bon signal”, mais de **prendre une décision globale cohérente** à partir de signaux partiels, parfois contradictoires.</text:p>
      <text:p text:style-name="Standard"/>
      <text:p text:style-name="Standard">---</text:p>
      <text:p text:style-name="Standard"/>
      <text:p text:style-name="Standard">## 1️⃣ Les grandes briques (responsabilités claires)</text:p>
      <text:p text:style-name="Standard"/>
      <text:p text:style-name="Standard">### ① Indicator</text:p>
      <text:p text:style-name="Standard"/>
      <text:p text:style-name="Standard">**Pourquoi**</text:p>
      <text:p text:style-name="Standard">Un indicateur ne doit jamais décider. Il décrit l’état du monde.</text:p>
      <text:p text:style-name="Standard"/>
      <text:p text:style-name="Standard">**Responsabilité**</text:p>
      <text:p text:style-name="Standard"/>
      <text:p text:style-name="Standard">* produire une mesure</text:p>
      <text:p text:style-name="Standard">* être déterministe</text:p>
      <text:p text:style-name="Standard">* ne rien connaître du DCA, du user, ni de l’argent</text:p>
      <text:p text:style-name="Standard"/>
      <text:p text:style-name="Standard">**Conceptuellement**</text:p>
      <text:p text:style-name="Standard"/>
      <text:p text:style-name="Standard">&gt; *“Voici ce que j’observe, maintenant.”*</text:p>
      <text:p text:style-name="Standard"/>
      <text:p text:style-name="Standard">---</text:p>
      <text:p text:style-name="Standard"/>
      <text:p text:style-name="Standard">### ② IndicatorSnapshot</text:p>
      <text:p text:style-name="Standard"/>
      <text:p text:style-name="Standard">**Pourquoi**</text:p>
      <text:p text:style-name="Standard">Les stratégies ne doivent pas recalculer les indicateurs.</text:p>
      <text:p text:style-name="Standard"/>
      <text:p text:style-name="Standard">**Responsabilité**</text:p>
      <text:p text:style-name="Standard"/>
      <text:p text:style-name="Standard">* figer l’état du marché à un instant T</text:p>
      <text:p text:style-name="Standard">* servir de base commune à toutes les stratégies</text:p>
      <text:p text:style-name="Standard"/>
      <text:p text:style-name="Standard">**Conceptuellement**</text:p>
      <text:p text:style-name="Standard"/>
      <text:p text:style-name="Standard">&gt; *“À cet instant, le marché ressemble à ça.”*</text:p>
      <text:p text:style-name="Standard"/>
      <text:p text:style-name="Standard">---</text:p>
      <text:p text:style-name="Standard"/>
      <text:p text:style-name="Standard">### ③ Strategy</text:p>
      <text:p text:style-name="Standard"/>
      <text:p text:style-name="Standard">**Pourquoi**</text:p>
      <text:p text:style-name="Standard"><text:soft-page-break/>Une stratégie est une **opinion**, pas une action.</text:p>
      <text:p text:style-name="Standard"/>
      <text:p text:style-name="Standard">**Responsabilité**</text:p>
      <text:p text:style-name="Standard"/>
      <text:p text:style-name="Standard">* lire le snapshot</text:p>
      <text:p text:style-name="Standard">* exprimer une conviction graduée</text:p>
      <text:p text:style-name="Standard">* pouvoir être ignorée</text:p>
      <text:p text:style-name="Standard"/>
      <text:p text:style-name="Standard">**Elle ne fait jamais :**</text:p>
      <text:p text:style-name="Standard"/>
      <text:p text:style-name="Standard">* d’ordre</text:p>
      <text:p text:style-name="Standard">* d’accès exchange</text:p>
      <text:p text:style-name="Standard">* de logique temporelle globale</text:p>
      <text:p text:style-name="Standard"/>
      <text:p text:style-name="Standard">**Conceptuellement**</text:p>
      <text:p text:style-name="Standard"/>
      <text:p text:style-name="Standard">&gt; *“Dans ce contexte, je penche plutôt pour…”*</text:p>
      <text:p text:style-name="Standard"/>
      <text:p text:style-name="Standard">---</text:p>
      <text:p text:style-name="Standard"/>
      <text:p text:style-name="Standard">### ④ StrategySignal</text:p>
      <text:p text:style-name="Standard"/>
      <text:p text:style-name="Standard">**Pourquoi**</text:p>
      <text:p text:style-name="Standard">Tout signal doit être contextualisé.</text:p>
      <text:p text:style-name="Standard"/>
      <text:p text:style-name="Standard">**Responsabilité**</text:p>
      <text:p text:style-name="Standard"/>
      <text:p text:style-name="Standard">* score directionnel</text:p>
      <text:p text:style-name="Standard">* confiance</text:p>
      <text:p text:style-name="Standard">* horizon (court / moyen / long)</text:p>
      <text:p text:style-name="Standard">* optionalement : type de risque</text:p>
      <text:p text:style-name="Standard"/>
      <text:p text:style-name="Standard">**Conceptuellement**</text:p>
      <text:p text:style-name="Standard"/>
      <text:p text:style-name="Standard">&gt; *“Je suis confiant à 70% que renforcer légèrement est pertinent.”*</text:p>
      <text:p text:style-name="Standard"/>
      <text:p text:style-name="Standard">---</text:p>
      <text:p text:style-name="Standard"/>
      <text:p text:style-name="Standard">### ⑤ StrategyAggregator</text:p>
      <text:p text:style-name="Standard"/>
      <text:p text:style-name="Standard">**Pourquoi**</text:p>
      <text:p text:style-name="Standard">Aucune stratégie ne doit avoir le dernier mot.</text:p>
      <text:p text:style-name="Standard"/>
      <text:p text:style-name="Standard">**Responsabilité**</text:p>
      <text:p text:style-name="Standard"/>
      <text:p text:style-name="Standard">* agréger</text:p>
      <text:p text:style-name="Standard">* lisser</text:p>
      <text:p text:style-name="Standard">* neutraliser les extrêmes</text:p>
      <text:p text:style-name="Standard">* détecter les conflits</text:p>
      <text:p text:style-name="Standard"/>
      <text:p text:style-name="Standard">**Conceptuellement**</text:p>
      <text:p text:style-name="Standard"/>
      <text:p text:style-name="Standard"><text:soft-page-break/>&gt; *“Globalement, que racontent les stratégies ?”*</text:p>
      <text:p text:style-name="Standard"/>
      <text:p text:style-name="Standard">---</text:p>
      <text:p text:style-name="Standard"/>
      <text:p text:style-name="Standard">### ⑥ DecisionContext</text:p>
      <text:p text:style-name="Standard"/>
      <text:p text:style-name="Standard">**Pourquoi**</text:p>
      <text:p text:style-name="Standard">La décision dépend aussi de **toi**, pas que du marché.</text:p>
      <text:p text:style-name="Standard"/>
      <text:p text:style-name="Standard">**Responsabilité**</text:p>
      <text:p text:style-name="Standard"/>
      <text:p text:style-name="Standard">* état du wallet</text:p>
      <text:p text:style-name="Standard">* historique des actions</text:p>
      <text:p text:style-name="Standard">* exposition actuelle</text:p>
      <text:p text:style-name="Standard">* règles de risque</text:p>
      <text:p text:style-name="Standard"/>
      <text:p text:style-name="Standard">**Conceptuellement**</text:p>
      <text:p text:style-name="Standard"/>
      <text:p text:style-name="Standard">&gt; *“Avec ce portefeuille, ce user, à ce moment…”*</text:p>
      <text:p text:style-name="Standard"/>
      <text:p text:style-name="Standard">---</text:p>
      <text:p text:style-name="Standard"/>
      <text:p text:style-name="Standard">### ⑦ DecisionEngine (le cerveau)</text:p>
      <text:p text:style-name="Standard"/>
      <text:p text:style-name="Standard">**Pourquoi**</text:p>
      <text:p text:style-name="Standard">C’est le seul endroit où une action peut émerger.</text:p>
      <text:p text:style-name="Standard"/>
      <text:p text:style-name="Standard">**Responsabilité**</text:p>
      <text:p text:style-name="Standard"/>
      <text:p text:style-name="Standard">* combiner :</text:p>
      <text:p text:style-name="Standard"/>
      <text:p text:style-name="Standard"><text:s text:c="2"/>* score global</text:p>
      <text:p text:style-name="Standard"><text:s text:c="2"/>* contexte user</text:p>
      <text:p text:style-name="Standard"><text:s text:c="2"/>* contraintes de risque</text:p>
      <text:p text:style-name="Standard">* décider :</text:p>
      <text:p text:style-name="Standard"/>
      <text:p text:style-name="Standard"><text:s text:c="2"/>* agir</text:p>
      <text:p text:style-name="Standard"><text:s text:c="2"/>* moduler</text:p>
      <text:p text:style-name="Standard"><text:s text:c="2"/>* s’abstenir</text:p>
      <text:p text:style-name="Standard"/>
      <text:p text:style-name="Standard">**Conceptuellement**</text:p>
      <text:p text:style-name="Standard"/>
      <text:p text:style-name="Standard">&gt; *“Voici ce que je fais, ou pourquoi je ne fais rien.”*</text:p>
      <text:p text:style-name="Standard"/>
      <text:p text:style-name="Standard">---</text:p>
      <text:p text:style-name="Standard"/>
      <text:p text:style-name="Standard">## 2️⃣ Comment obtenir une décision globale cohérente</text:p>
      <text:p text:style-name="Standard"/>
      <text:p text:style-name="Standard">### Étape 1 — Perception unique</text:p>
      <text:p text:style-name="Standard"/>
      <text:p text:style-name="Standard">Tous les indicateurs sont calculés **une seule fois**</text:p>
      <text:p text:style-name="Standard">→ un snapshot partagé</text:p>
      <text:p text:style-name="Standard"><text:soft-page-break/></text:p>
      <text:p text:style-name="Standard">&gt; Évite les décisions incohérentes dues à des calculs décalés.</text:p>
      <text:p text:style-name="Standard"/>
      <text:p text:style-name="Standard">---</text:p>
      <text:p text:style-name="Standard"/>
      <text:p text:style-name="Standard">### Étape 2 — Opinions indépendantes</text:p>
      <text:p text:style-name="Standard"/>
      <text:p text:style-name="Standard">Chaque stratégie :</text:p>
      <text:p text:style-name="Standard"/>
      <text:p text:style-name="Standard">* lit le même snapshot</text:p>
      <text:p text:style-name="Standard">* produit son signal</text:p>
      <text:p text:style-name="Standard">* ignore les autres</text:p>
      <text:p text:style-name="Standard"/>
      <text:p text:style-name="Standard">&gt; Isolation = robustesse</text:p>
      <text:p text:style-name="Standard"/>
      <text:p text:style-name="Standard">---</text:p>
      <text:p text:style-name="Standard"/>
      <text:p text:style-name="Standard">### Étape 3 — Agrégation non linéaire</text:p>
      <text:p text:style-name="Standard"/>
      <text:p text:style-name="Standard">L’agrégateur :</text:p>
      <text:p text:style-name="Standard"/>
      <text:p text:style-name="Standard">* pondère</text:p>
      <text:p text:style-name="Standard">* atténue</text:p>
      <text:p text:style-name="Standard">* plafonne</text:p>
      <text:p text:style-name="Standard"/>
      <text:p text:style-name="Standard">Exemples conceptuels :</text:p>
      <text:p text:style-name="Standard"/>
      <text:p text:style-name="Standard">* 5 stratégies faiblement positives &gt; 1 très positive</text:p>
      <text:p text:style-name="Standard">* 1 stratégie très négative peut bloquer tout le reste</text:p>
      <text:p text:style-name="Standard">* trop de divergence → neutralité</text:p>
      <text:p text:style-name="Standard"/>
      <text:p text:style-name="Standard">&gt; Le conflit est un signal en soi.</text:p>
      <text:p text:style-name="Standard"/>
      <text:p text:style-name="Standard">---</text:p>
      <text:p text:style-name="Standard"/>
      <text:p text:style-name="Standard">### Étape 4 — Décision sous contraintes</text:p>
      <text:p text:style-name="Standard"/>
      <text:p text:style-name="Standard">Le moteur :</text:p>
      <text:p text:style-name="Standard"/>
      <text:p text:style-name="Standard">* adapte l’intensité</text:p>
      <text:p text:style-name="Standard">* vérifie les règles de survie</text:p>
      <text:p text:style-name="Standard">* peut dire *non*</text:p>
      <text:p text:style-name="Standard"/>
      <text:p text:style-name="Standard">&gt; Un bon bot sait **quand ne pas jouer**.</text:p>
      <text:p text:style-name="Standard"/>
      <text:p text:style-name="Standard">---</text:p>
      <text:p text:style-name="Standard"/>
      <text:p text:style-name="Standard">## 3️⃣ Pourquoi cette structure tient dans le temps</text:p>
      <text:p text:style-name="Standard"/>
      <text:p text:style-name="Standard">* Tu peux :</text:p>
      <text:p text:style-name="Standard"/>
      <text:p text:style-name="Standard"><text:s text:c="2"/>* ajouter un indicateur sans toucher au reste</text:p>
      <text:p text:style-name="Standard"><text:soft-page-break/><text:s text:c="2"/>* désactiver une stratégie sans casser la décision</text:p>
      <text:p text:style-name="Standard"><text:s text:c="2"/>* changer la logique DCA sans réécrire les signaux</text:p>
      <text:p text:style-name="Standard"/>
      <text:p text:style-name="Standard">* Elle est :</text:p>
      <text:p text:style-name="Standard"/>
      <text:p text:style-name="Standard"><text:s text:c="2"/>* testable</text:p>
      <text:p text:style-name="Standard"><text:s text:c="2"/>* explicable</text:p>
      <text:p text:style-name="Standard"><text:s text:c="2"/>* observable (logs, métriques)</text:p>
      <text:p text:style-name="Standard"/>
      <text:p text:style-name="Standard">---</text:p>
      <text:p text:style-name="Standard"/>
      <text:p text:style-name="Standard">## 4️⃣ Le point vraiment important (et souvent oublié)</text:p>
      <text:p text:style-name="Standard"/>
      <text:p text:style-name="Standard">La **décision n’est pas un calcul**, c’est un **processus**.</text:p>
      <text:p text:style-name="Standard"/>
      <text:p text:style-name="Standard">Si tu peux répondre à :</text:p>
      <text:p text:style-name="Standard"/>
      <text:p text:style-name="Standard">&gt; *“Pourquoi le bot a acheté ici ?”*</text:p>
      <text:p text:style-name="Standard"/>
      <text:p text:style-name="Standard">alors ton architecture est saine.</text:p>
      <text:p text:style-name="Standard"/>
      <text:p text:style-name="Standard">---</text:p>
      <text:p text:style-name="Standard"/>
      <text:p text:style-name="Standard">### Anecdote pour conclure</text:p>
      <text:p text:style-name="Standard"/>
      <text:p text:style-name="Standard">Les systèmes de trading qui survivent longtemps sont rarement les plus “intelligents”, mais ceux dont les responsabilités sont **impossibles à confondre**. Tu es clairement sur cette voie.</text:p>
      <text:p text:style-name="Standard"/>
      <text:p text:style-name="Standard">Si tu veux, au prochain échange on peut :</text:p>
      <text:p text:style-name="Standard"/>
      <text:p text:style-name="Standard">* simuler une journée complète de décision</text:p>
      <text:p text:style-name="Standard">* réfléchir à la gestion des conflits entre stratégies</text:p>
      <text:p text:style-name="Standard">* ou définir ce qui mérite d’être loggé pour comprendre le bot a posterior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0T20:12:15.364641400</meta:creation-date>
    <dc:date>2026-01-10T20:15:00.541929100</dc:date>
    <meta:editing-duration>PT2M45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7" meta:paragraph-count="190" meta:word-count="965" meta:character-count="6336" meta:non-whitespace-character-count="5433"/>
  </office:meta>
</office:document-meta>
</file>