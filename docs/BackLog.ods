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5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ODO&quot;;&quot;RUNNING&quot;;&quot;DONE&quot;)" table:allow-empty-cell="true" table:display-list="unsorted" table:base-cell-address="Feuille1.F6">
          <table:help-message table:display="true"/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16377"/>
        <table:table-row table:style-name="ro1" table:number-rows-repeated="4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Unit State</text:p>
          </table:table-cell>
          <table:table-cell table:style-name="ce4"/>
          <table:table-cell table:style-name="ce1" office:value-type="string" calcext:value-type="string">
            <text:p>Task State</text:p>
          </table:table-cell>
          <table:table-cell table:style-name="ce1" table:number-columns-repeated="16378"/>
        </table:table-row>
        <table:table-row table:style-name="ro3">
          <table:table-cell office:value-type="string" calcext:value-type="string">
            <text:p>1.0</text:p>
          </table:table-cell>
          <table:table-cell table:style-name="ce2" office:value-type="string" calcext:value-type="string">
            <text:p>Implémentation Kraken</text:p>
          </table:table-cell>
          <table:table-cell table:style-name="Default"/>
          <table:table-cell table:style-name="Default" table:formula="of:=IF(COUNTIF([.F7:.F13];&quot;DONE&quot;)=ROWS([.F7:.F13]);&quot;DONE&quot;;IF(COUNTIF([.F7:.F13];&quot;TODO&quot;)+COUNTBLANK([.F7:.F13])=ROWS([.F7:.F13]);&quot;TODO&quot;;&quot;RUNING&quot;))" office:value-type="string" office:string-value="RUNING" calcext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1</text:p>
          </table:table-cell>
          <table:table-cell/>
          <table:table-cell table:style-name="ce5" office:value-type="string" calcext:value-type="string">
            <text:p>Créer la classe KrakenApiClient qui implémente ExchangeApiClient</text:p>
          </table:table-cell>
          <table:table-cell table:style-name="ce5"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Utiliser l’API officielle Kraken pour :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getExchangeCode() → retourner "KRAKEN"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getBalance() / getAllBalances() → récupérer soldes (mapping asset → quantity)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getMarketPrice() → ticker spot pour une paire donnée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1.6</text:p>
          </table:table-cell>
          <table:table-cell/>
          <table:table-cell office:value-type="string" calcext:value-type="string">
            <text:p>getHistoricalTrades() / getTradesSince() → extraire l’historique des trades</text:p>
          </table:table-cell>
          <table:table-cell table:number-columns-repeated="2"/>
          <table:table-cell table:content-validation-name="val1" office:value-type="string" calcext:value-type="string">
            <text:p>RUNNING</text:p>
          </table:table-cell>
          <table:table-cell office:value-type="string" calcext:value-type="string">
            <text:p>Bug ?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Gérer authentification API key/secret a l’Initialisation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 table:number-columns-repeated="3"/>
          <table:table-cell table:number-columns-repeated="2"/>
          <table:table-cell table:style-name="Default" table:number-columns-repeated="16377"/>
        </table:table-row>
        <table:table-row table:style-name="ro4">
          <table:table-cell office:value-type="string" calcext:value-type="string">
            <text:p>2.0</text:p>
          </table:table-cell>
          <table:table-cell table:style-name="ce2" office:value-type="string" calcext:value-type="string">
            <text:p>Consolidation Multi-Exchange</text:p>
          </table:table-cell>
          <table:table-cell table:style-name="Default"/>
          <table:table-cell table:style-name="Default" table:formula="of:=IF(COUNTIF([.F16:.F18];&quot;DONE&quot;)=ROWS([.F16:.F18]);&quot;DONE&quot;;IF(COUNTIF([.F16:.F18];&quot;TODO&quot;)+COUNTBLANK([.F16:.F18])=ROWS([.F16:.F18]);&quot;TODO&quot;;&quot;RUNING&quot;))" office:value-type="string" office:string-value="RUNING" calcext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S’assurer que tous les échanges (BinanceApiClient, CryptoComApiClient, KrakenApiClient) respectent strictement l’interface</text:p>
          </table:table-cell>
          <table:table-cell table:style-name="ce5"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Vérifier que WalletSource inclut Kraken et autres exchanges prévus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Gestion unifiée des symboles (BTC vs XBT, LDUSDC → USDC)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4">
          <table:table-cell office:value-type="string" calcext:value-type="string">
            <text:p>3.0</text:p>
          </table:table-cell>
          <table:table-cell table:style-name="ce2" office:value-type="string" calcext:value-type="string">
            <text:p>Mécanismes de Trading déjà prévus</text:p>
          </table:table-cell>
          <table:table-cell table:style-name="Default"/>
          <table:table-cell table:style-name="Default" table:formula="of:=IF(COUNTIF([.F21:.F26];&quot;DONE&quot;)=ROWS([.F21:.F26]);&quot;DONE&quot;;IF(COUNTIF([.F21:.F26];&quot;TODO&quot;)+COUNTBLANK([.F21:.F26])=ROWS([.F21:.F26]);&quot;TODO&quot;;&quot;RUNING&quot;))" office:value-type="string" office:string-value="RUNING" calcext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1</text:p>
          </table:table-cell>
          <table:table-cell/>
          <table:table-cell table:style-name="ce5" office:value-type="string" calcext:value-type="string">
            <text:p>GridBot : espacement dynamique des lignes en fonction du portefeuille</text:p>
          </table:table-cell>
          <table:table-cell table:style-name="ce5"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</text:p>
          </table:table-cell>
          <table:table-cell/>
          <table:table-cell table:style-name="ce5" office:value-type="string" calcext:value-type="string">
            <text:p>DCA intelligent : ajustement en fonction d’indicateurs (RSI, Rainbow Chart)</text:p>
          </table:table-cell>
          <table:table-cell table:number-columns-repeated="2"/>
          <table:table-cell table:content-validation-name="val1" office:value-type="string" calcext:value-type="string">
            <text:p>RUNNING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3</text:p>
          </table:table-cell>
          <table:table-cell/>
          <table:table-cell table:style-name="ce5" office:value-type="string" calcext:value-type="string">
            <text:p>Trailing Stop intelligent : delta ajustable + modulation par temps et volatilité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4</text:p>
          </table:table-cell>
          <table:table-cell/>
          <table:table-cell table:style-name="ce5" office:value-type="string" calcext:value-type="string">
            <text:p>Crash Recovery : pause ou renfort achat après chute brutale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5</text:p>
          </table:table-cell>
          <table:table-cell/>
          <table:table-cell table:style-name="ce5" office:value-type="string" calcext:value-type="string">
            <text:p>Rééquilibrage auto : selon pondération cible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3">
          <table:table-cell office:value-type="string" calcext:value-type="string">
            <text:p>4.0</text:p>
          </table:table-cell>
          <table:table-cell table:style-name="ce2" office:value-type="string" calcext:value-type="string">
            <text:p>Services Transverses</text:p>
          </table:table-cell>
          <table:table-cell table:style-name="Default"/>
          <table:table-cell table:style-name="Default" table:formula="of:=IF(COUNTIF([.F28:.F30];&quot;DONE&quot;)=ROWS([.F28:.F30]);&quot;DONE&quot;;IF(COUNTIF([.F28:.F30];&quot;TODO&quot;)+COUNTBLANK([.F28:.F30])=ROWS([.F28:.F30]);&quot;TODO&quot;;&quot;RUNING&quot;))" office:value-type="string" office:string-value="TODO" calcext:value-type="string">
            <text:p>TODO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calcext:value-type="string">
            <text:p>4.1</text:p>
          </table:table-cell>
          <table:table-cell/>
          <table:table-cell table:style-name="ce5" office:value-type="string" calcext:value-type="string">
            <text:p>Journalisation intelligente : historique, exports JSON/CSV, rapports hebdos</text:p>
          </table:table-cell>
          <table:table-cell table:style-name="ce5"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4.2</text:p>
          </table:table-cell>
          <table:table-cell/>
          <table:table-cell table:style-name="ce5" office:value-type="string" calcext:value-type="string">
            <text:p>Alertes : variations rapides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4.3</text:p>
          </table:table-cell>
          <table:table-cell/>
          <table:table-cell table:style-name="ce5" office:value-type="string" calcext:value-type="string">
            <text:p>Transfert auto de bénéfices : % vers wallet Ledger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1</text:p>
          </table:table-cell>
          <table:table-cell table:style-name="ce3" office:value-type="string" calcext:value-type="string">
            <text:p>Définir la fréquence d’achat</text:p>
          </table:table-cell>
          <table:table-cell office:value-type="string" calcext:value-type="string">
            <text:p>Ex : toutes les semaines, ou configurable par l’utilisateur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2</text:p>
          </table:table-cell>
          <table:table-cell table:style-name="ce3" office:value-type="string" calcext:value-type="string">
            <text:p>Définir le montant de base</text:p>
          </table:table-cell>
          <table:table-cell office:value-type="string" calcext:value-type="string">
            <text:p>Ex : 25€ par défaut, configurable</text:p>
          </table:table-cell>
          <table:table-cell table:number-columns-repeated="2"/>
          <table:table-cell table:content-validation-name="val1" office:value-type="string" calcext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3</text:p>
          </table:table-cell>
          <table:table-cell table:style-name="ce3" office:value-type="string" calcext:value-type="string">
            <text:p>Intégrer indicateur RSI</text:p>
          </table:table-cell>
          <table:table-cell office:value-type="string" calcext:value-type="string">
            <text:p>Lire RSI et ajuster montant selon zone de sur/sous-cotation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4</text:p>
          </table:table-cell>
          <table:table-cell table:style-name="ce3" office:value-type="string" calcext:value-type="string">
            <text:p>Intégrer Rainbow Chart</text:p>
          </table:table-cell>
          <table:table-cell office:value-type="string" calcext:value-type="string">
            <text:p>Ajustement supplémentaire selon position dans les bandes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5</text:p>
          </table:table-cell>
          <table:table-cell table:style-name="ce3" office:value-type="string" calcext:value-type="string">
            <text:p>Détection sous-cotation / sur-cotation</text:p>
          </table:table-cell>
          <table:table-cell office:value-type="string" calcext:value-type="string">
            <text:p>Si actif sous-coté → augmenter l’achat, sur-coté → diminuer ou vendre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6</text:p>
          </table:table-cell>
          <table:table-cell table:style-name="ce3" office:value-type="string" calcext:value-type="string">
            <text:p>Journalisation</text:p>
          </table:table-cell>
          <table:table-cell office:value-type="string" calcext:value-type="string">
            <text:p>Sauvegarder chaque opération dans base / log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7</text:p>
          </table:table-cell>
          <table:table-cell table:style-name="ce3" office:value-type="string" calcext:value-type="string">
            <text:p>Tests unitaires</text:p>
          </table:table-cell>
          <table:table-cell office:value-type="string" calcext:value-type="string">
            <text:p>Vérifier calculs dynamiques et déclenchement des achats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calcext:value-type="string">
            <text:p>3.2.8</text:p>
          </table:table-cell>
          <table:table-cell table:style-name="ce3" office:value-type="string" calcext:value-type="string">
            <text:p>Tests d’intégration</text:p>
          </table:table-cell>
          <table:table-cell office:value-type="string" calcext:value-type="string">
            <text:p>Avec Kraken / Binance pour vérifier exécution réelle des ordres</text:p>
          </table:table-cell>
          <table:table-cell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3.2.9</text:p>
          </table:table-cell>
          <table:table-cell office:value-type="string" calcext:value-type="string">
            <text:p>Gérer un cache Bougies</text:p>
          </table:table-cell>
          <table:table-cell table:style-name="Default" office:value-type="string" calcext:value-type="string">
            <text:p>A la façon du cache sur les Balances</text:p>
          </table:table-cell>
          <table:table-cell table:style-name="Default" table:number-columns-repeated="2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5.0</text:p>
          </table:table-cell>
          <table:table-cell office:value-type="string" calcext:value-type="string">
            <text:p>Sécurisation</text:p>
          </table:table-cell>
          <table:table-cell table:style-name="Default" table:number-columns-repeated="3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5.1</text:p>
          </table:table-cell>
          <table:table-cell/>
          <table:table-cell table:style-name="Default" office:value-type="string" calcext:value-type="string">
            <text:p>Sortir les clés d’API du code !</text:p>
          </table:table-cell>
          <table:table-cell table:style-name="Default" table:formula="of:=IF(COUNTIF([.F42:.F45];&quot;DONE&quot;)=ROWS([.F42:.F45]);&quot;DONE&quot;;IF(COUNTIF([.F42:.F45];&quot;TODO&quot;)+COUNTBLANK([.F42:.F45])=ROWS([.F42:.F45]);&quot;TODO&quot;;&quot;RUNING&quot;))" office:value-type="string" office:string-value="TODO" calcext:value-type="string">
            <text:p>TODO</text:p>
          </table:table-cell>
          <table:table-cell table:style-name="Default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content-validation-name="val1" office:value-type="string" calcext:value-type="string">
            <text:p>TODO</text:p>
          </table:table-cell>
          <table:table-cell/>
          <table:table-cell table:style-name="Default" table:number-columns-repeated="16377"/>
        </table:table-row>
      </table:table>
      <table:named-expressions/>
      <table:database-ranges>
        <table:database-range table:name="TasksState" table:target-range-address="Feuille1.F7:Feuille1.F1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9:34:30.46319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4T18:52:52.307848600</meta:creation-date>
    <dc:date>2026-01-07T19:42:48.170482400</dc:date>
    <meta:editing-duration>PT2H54M31S</meta:editing-duration>
    <meta:editing-cycles>4</meta:editing-cycles>
    <meta:generator>LibreOffice/25.2.7.2$Windows_X86_64 LibreOffice_project/5cbfd1ab6520636bb5f7b99185aa69bd7456825d</meta:generator>
    <meta:document-statistic meta:table-count="1" meta:cell-count="114" meta:object-count="0"/>
  </office:meta>
</office:document-meta>
</file>