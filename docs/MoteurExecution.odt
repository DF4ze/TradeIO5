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7.542cm" table:align="left"/>
    </style:style>
    <style:style style:name="Tableau1.A" style:family="table-column">
      <style:table-column-properties style:column-width="3.445cm"/>
    </style:style>
    <style:style style:name="Tableau1.B" style:family="table-column">
      <style:table-column-properties style:column-width="4.098cm"/>
    </style:style>
    <style:style style:name="Tableau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style:style style:name="P46" style:family="paragraph" style:parent-style-name="Text_20_body" style:list-style-name="L46"/>
    <style:style style:name="P47" style:family="paragraph" style:parent-style-name="Text_20_body" style:list-style-name="L47"/>
    <style:style style:name="P48" style:family="paragraph" style:parent-style-name="Text_20_body" style:list-style-name="L48"/>
    <style:style style:name="P49" style:family="paragraph" style:parent-style-name="Text_20_body" style:list-style-name="L49"/>
    <style:style style:name="P50" style:family="paragraph" style:parent-style-name="Text_20_body" style:list-style-name="L50"/>
    <style:style style:name="P51" style:family="paragraph" style:parent-style-name="Text_20_body" style:list-style-name="L51"/>
    <style:style style:name="P52" style:family="paragraph" style:parent-style-name="Horizontal_20_Line">
      <style:paragraph-properties fo:margin-top="0cm" fo:margin-bottom="0.247cm" style:contextual-spacing="false" fo:line-height="115%"/>
    </style:style>
    <style:style style:name="P53" style:family="paragraph" style:parent-style-name="Heading_20_2">
      <style:paragraph-properties fo:margin-top="0cm" fo:margin-bottom="0.247cm" style:contextual-spacing="false" fo:line-height="115%"/>
    </style:style>
    <style:style style:name="P54" style:family="paragraph" style:parent-style-name="Heading_20_3">
      <style:paragraph-properties fo:margin-top="0cm" fo:margin-bottom="0.247cm" style:contextual-spacing="false" fo:line-height="115%"/>
    </style:style>
    <style:style style:name="P55" style:family="paragraph" style:parent-style-name="Text_20_body" style:list-style-name="L52"/>
    <style:style style:name="P56" style:family="paragraph" style:parent-style-name="Preformatted_20_Text">
      <style:paragraph-properties fo:margin-top="0cm" fo:margin-bottom="0.247cm" style:contextual-spacing="false" fo:line-height="115%"/>
    </style:style>
    <style:style style:name="P57" style:family="paragraph" style:parent-style-name="Text_20_body" style:list-style-name="L53"/>
    <style:style style:name="P58" style:family="paragraph" style:parent-style-name="Quotations">
      <style:paragraph-properties fo:margin-top="0cm" fo:margin-bottom="0.247cm" style:contextual-spacing="false" fo:line-height="115%"/>
    </style:style>
    <style:style style:name="P59" style:family="paragraph" style:parent-style-name="Text_20_body" style:list-style-name="L54"/>
    <style:style style:name="P60" style:family="paragraph" style:parent-style-name="Text_20_body" style:list-style-name="L55"/>
    <style:style style:name="P61" style:family="paragraph" style:parent-style-name="Heading_20_4">
      <style:paragraph-properties fo:margin-top="0cm" fo:margin-bottom="0.247cm" style:contextual-spacing="false" fo:line-height="115%"/>
    </style:style>
    <style:style style:name="P62" style:family="paragraph" style:parent-style-name="Text_20_body" style:list-style-name="L56"/>
    <style:style style:name="P63" style:family="paragraph" style:parent-style-name="Text_20_body" style:list-style-name="L57"/>
    <style:style style:name="P64" style:family="paragraph" style:parent-style-name="Text_20_body" style:list-style-name="L58"/>
    <style:style style:name="P65" style:family="paragraph" style:parent-style-name="Text_20_body" style:list-style-name="L59"/>
    <style:style style:name="P66" style:family="paragraph" style:parent-style-name="Text_20_body" style:list-style-name="L60"/>
    <style:style style:name="P67" style:family="paragraph" style:parent-style-name="Text_20_body" style:list-style-name="L61"/>
    <style:style style:name="P68" style:family="paragraph" style:parent-style-name="Text_20_body" style:list-style-name="L62"/>
    <style:style style:name="P69" style:family="paragraph" style:parent-style-name="Heading_20_1">
      <style:paragraph-properties fo:margin-top="0cm" fo:margin-bottom="0.247cm" style:contextual-spacing="false" fo:line-height="115%"/>
    </style:style>
    <style:style style:name="P70" style:family="paragraph" style:parent-style-name="Text_20_body" style:list-style-name="L63"/>
    <style:style style:name="P71" style:family="paragraph" style:parent-style-name="Text_20_body" style:list-style-name="L64"/>
    <style:style style:name="P72" style:family="paragraph" style:parent-style-name="Text_20_body" style:list-style-name="L65"/>
    <style:style style:name="P73" style:family="paragraph" style:parent-style-name="Text_20_body" style:list-style-name="L66"/>
    <style:style style:name="P74" style:family="paragraph" style:parent-style-name="Text_20_body" style:list-style-name="L67"/>
    <style:style style:name="P75" style:family="paragraph" style:parent-style-name="Text_20_body" style:list-style-name="L68"/>
    <style:style style:name="P76" style:family="paragraph" style:parent-style-name="Text_20_body" style:list-style-name="L69"/>
    <style:style style:name="P77" style:family="paragraph" style:parent-style-name="Text_20_body" style:list-style-name="L70"/>
    <style:style style:name="P78" style:family="paragraph" style:parent-style-name="Text_20_body" style:list-style-name="L71"/>
    <style:style style:name="P79" style:family="paragraph" style:parent-style-name="Text_20_body" style:list-style-name="L72"/>
    <style:style style:name="P80" style:family="paragraph" style:parent-style-name="Text_20_body" style:list-style-name="L73"/>
    <style:style style:name="P81" style:family="paragraph" style:parent-style-name="Text_20_body" style:list-style-name="L74"/>
    <style:style style:name="P82" style:family="paragraph" style:parent-style-name="Text_20_body" style:list-style-name="L75"/>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apport d’architecture – Moteur de décision TradeIO</text:h>
      <text:h text:style-name="Heading_20_2" text:outline-level="2">Sommaire</text:h>
      <text:list text:style-name="L1">
        <text:list-item>
          <text:p text:style-name="P1">Introduction et contexte</text:p>
        </text:list-item>
        <text:list-item>
          <text:p text:style-name="P1">Vision globale de l’architecture cible</text:p>
        </text:list-item>
        <text:list-item>
          <text:p text:style-name="P1">Séparation des responsabilités (principes structurants)</text:p>
        </text:list-item>
        <text:list-item>
          <text:p text:style-name="P1">Decision, Strategy, Indicator : graphe logique et exécution</text:p>
        </text:list-item>
        <text:list-item>
          <text:p text:style-name="P1">Paramétrage, versioning et résolution de configuration</text:p>
        </text:list-item>
        <text:list-item>
          <text:p text:style-name="P1">Orchestration et Scheduler</text:p>
        </text:list-item>
        <text:list-item>
          <text:p text:style-name="P1">Gestion de l’état, exécution des actions et suivi des positions</text:p>
        </text:list-item>
        <text:list-item>
          <text:p text:style-name="P1">Historisation, traçabilité et auditabilité</text:p>
        </text:list-item>
        <text:list-item>
          <text:p text:style-name="P1">Backtesting et rejouabilité</text:p>
        </text:list-item>
        <text:list-item>
          <text:p text:style-name="P1">Multi-utilisateur, multi-wallet et isolation des exécutions</text:p>
        </text:list-item>
        <text:list-item>
          <text:p text:style-name="P1">Activation / désactivation et validation de cohérence</text:p>
        </text:list-item>
        <text:list-item>
          <text:p text:style-name="P1">Points d’attention sur MarketDatasetEngine et arbre de décision</text:p>
        </text:list-item>
        <text:list-item>
          <text:p text:style-name="P1">Forces, faiblesses et risques identifiés</text:p>
        </text:list-item>
        <text:list-item>
          <text:p text:style-name="P1">Recommandations et pistes d’amélioration</text:p>
        </text:list-item>
        <text:list-item>
          <text:p text:style-name="P1">Conclusion</text:p>
        </text:list-item>
      </text:list>
      <text:p text:style-name="Horizontal_20_Line"/>
      <text:h text:style-name="Heading_20_2" text:outline-level="2">1. Introduction et contexte</text:h>
      <text:p text:style-name="Text_20_body">Ce rapport synthétise la réflexion menée autour de l’architecture du moteur de décision de TradeIO. L’objectif est de garantir un système :</text:p>
      <text:list text:style-name="L2">
        <text:list-item>
          <text:p text:style-name="P2">déterministe</text:p>
        </text:list-item>
        <text:list-item>
          <text:p text:style-name="P2">rejouable (backtesting)</text:p>
        </text:list-item>
        <text:list-item>
          <text:p text:style-name="P2">explicable</text:p>
        </text:list-item>
        <text:list-item>
          <text:p text:style-name="P2">multi-utilisateur</text:p>
        </text:list-item>
        <text:list-item>
          <text:p text:style-name="P2">extensible</text:p>
        </text:list-item>
      </text:list>
      <text:p text:style-name="Text_20_body">Les composants <text:span text:style-name="Strong_20_Emphasis">MarketDatasetEngine</text:span> et <text:span text:style-name="Strong_20_Emphasis">l’arbre de décision (Decision / Strategy / Indicator)</text:span> sont considérés comme existants et fonctionnels. Le rapport se concentre donc sur leur intégration, leur orchestration et les couches périphériques nécessaires à un moteur de trading robuste.</text:p>
      <text:p text:style-name="Horizontal_20_Line"/>
      <text:h text:style-name="Heading_20_2" text:outline-level="2"><text:soft-page-break/>2. Vision globale de l’architecture cible</text:h>
      <text:p text:style-name="Text_20_body">L’architecture cible repose sur une séparation claire entre :</text:p>
      <text:list text:style-name="L3">
        <text:list-item>
          <text:p text:style-name="P3"><text:span text:style-name="Strong_20_Emphasis">Données de marché</text:span> (MarketDataset)</text:p>
        </text:list-item>
        <text:list-item>
          <text:p text:style-name="P3"><text:span text:style-name="Strong_20_Emphasis">Logique décisionnelle pure</text:span> (Decision / Strategy / Indicator)</text:p>
        </text:list-item>
        <text:list-item>
          <text:p text:style-name="P3"><text:span text:style-name="Strong_20_Emphasis">Orchestration</text:span> (Scheduler + Engine)</text:p>
        </text:list-item>
        <text:list-item>
          <text:p text:style-name="P3"><text:span text:style-name="Strong_20_Emphasis">État utilisateur</text:span> (wallet, positions, risque)</text:p>
        </text:list-item>
        <text:list-item>
          <text:p text:style-name="P3"><text:span text:style-name="Strong_20_Emphasis">Exécution et historisation</text:span></text:p>
        </text:list-item>
      </text:list>
      <text:p text:style-name="Text_20_body">La décision n’est jamais un point d’entrée direct : elle est toujours invoquée dans le cadre d’une <text:span text:style-name="Strong_20_Emphasis">DecisionExecution</text:span>, unité atomique du système.</text:p>
      <text:p text:style-name="Horizontal_20_Line"/>
      <text:h text:style-name="Heading_20_2" text:outline-level="2">3. Séparation des responsabilités (principes structurants)</text:h>
      <text:h text:style-name="Heading_20_3" text:outline-level="3">Forces</text:h>
      <text:list text:style-name="L4">
        <text:list-item>
          <text:p text:style-name="P4">Testabilité élevée</text:p>
        </text:list-item>
        <text:list-item>
          <text:p text:style-name="P4">Lisibilité du raisonnement</text:p>
        </text:list-item>
        <text:list-item>
          <text:p text:style-name="P4">Réutilisabilité maximale</text:p>
        </text:list-item>
      </text:list>
      <text:h text:style-name="Heading_20_3" text:outline-level="3">Risques</text:h>
      <text:list text:style-name="L5">
        <text:list-item>
          <text:p text:style-name="P5">Tentation d’introduire de la logique métier dans les mauvaises couches</text:p>
        </text:list-item>
      </text:list>
      <text:h text:style-name="Heading_20_3" text:outline-level="3">Recommandations</text:h>
      <text:list text:style-name="L6">
        <text:list-item>
          <text:p text:style-name="P6">Interdire tout accès DB dans Decision / Strategy / Indicator</text:p>
        </text:list-item>
        <text:list-item>
          <text:p text:style-name="P6">Valider les frontières par des conventions strictes et des tests</text:p>
        </text:list-item>
      </text:list>
      <text:p text:style-name="Horizontal_20_Line"/>
      <text:h text:style-name="Heading_20_2" text:outline-level="2">4. Decision, Strategy, Indicator : graphe logique et exécution</text:h>
      <text:p text:style-name="Text_20_body">Le modèle est un <text:span text:style-name="Strong_20_Emphasis">graphe réutilisable</text:span>, et non un arbre strict :</text:p>
      <text:list text:style-name="L7">
        <text:list-item>
          <text:p text:style-name="P7">une Decision référence plusieurs Strategy</text:p>
        </text:list-item>
        <text:list-item>
          <text:p text:style-name="P7">une Strategy référence plusieurs Indicator</text:p>
        </text:list-item>
        <text:list-item>
          <text:p text:style-name="P7">un Indicator peut être partagé</text:p>
        </text:list-item>
      </text:list>
      <text:h text:style-name="Heading_20_3" text:outline-level="3">Forces</text:h>
      <text:list text:style-name="L8">
        <text:list-item>
          <text:p text:style-name="P8">Mutualisation des composants</text:p>
        </text:list-item>
        <text:list-item>
          <text:p text:style-name="P8">Grande flexibilité de composition</text:p>
        </text:list-item>
      </text:list>
      <text:h text:style-name="Heading_20_3" text:outline-level="3"><text:soft-page-break/>Faiblesses</text:h>
      <text:list text:style-name="L9">
        <text:list-item>
          <text:p text:style-name="P9">Complexité de résolution</text:p>
        </text:list-item>
        <text:list-item>
          <text:p text:style-name="P9">Risque d’incohérence si mal validé</text:p>
        </text:list-item>
      </text:list>
      <text:h text:style-name="Heading_20_3" text:outline-level="3">Solutions proposées</text:h>
      <text:list text:style-name="L10">
        <text:list-item>
          <text:p text:style-name="P10">Résolution complète du graphe <text:span text:style-name="Strong_20_Emphasis">avant exécution</text:span></text:p>
        </text:list-item>
        <text:list-item>
          <text:p text:style-name="P10">Rejet de toute configuration partielle ou invalide</text:p>
        </text:list-item>
      </text:list>
      <text:p text:style-name="Horizontal_20_Line"/>
      <text:h text:style-name="Heading_20_2" text:outline-level="2">5. Paramétrage, versioning et résolution de configuration</text:h>
      <text:h text:style-name="Heading_20_3" text:outline-level="3">Principe clé</text:h>
      <text:list text:style-name="L11">
        <text:list-item>
          <text:p text:style-name="P11"><text:span text:style-name="Strong_20_Emphasis">Decision (code)</text:span> ≠ <text:span text:style-name="Strong_20_Emphasis">DecisionConfig (DB)</text:span> ≠ <text:span text:style-name="Strong_20_Emphasis">DecisionExecution (runtime)</text:span></text:p>
        </text:list-item>
      </text:list>
      <text:h text:style-name="Heading_20_3" text:outline-level="3">Forces</text:h>
      <text:list text:style-name="L12">
        <text:list-item>
          <text:p text:style-name="P12">Hot reload possible</text:p>
        </text:list-item>
        <text:list-item>
          <text:p text:style-name="P12">Backtest reproductible</text:p>
        </text:list-item>
      </text:list>
      <text:h text:style-name="Heading_20_3" text:outline-level="3">Faiblesses</text:h>
      <text:list text:style-name="L13">
        <text:list-item>
          <text:p text:style-name="P13">Coût mémoire et stockage</text:p>
        </text:list-item>
      </text:list>
      <text:h text:style-name="Heading_20_3" text:outline-level="3">Recommandations</text:h>
      <text:list text:style-name="L14">
        <text:list-item>
          <text:p text:style-name="P14">Versionner explicitement chaque configuration</text:p>
        </text:list-item>
        <text:list-item>
          <text:p text:style-name="P14">Aplatir la configuration en snapshot immuable à l’exécution</text:p>
        </text:list-item>
      </text:list>
      <text:p text:style-name="Horizontal_20_Line"/>
      <text:h text:style-name="Heading_20_2" text:outline-level="2">6. Orchestration et Scheduler</text:h>
      <text:h text:style-name="Heading_20_3" text:outline-level="3">Modèle retenu</text:h>
      <text:list text:style-name="L15">
        <text:list-item>
          <text:p text:style-name="P15">Scheduler central (tick)</text:p>
        </text:list-item>
        <text:list-item>
          <text:p text:style-name="P15">Table de tâches en base (PENDING / RUNNING / ERROR / DONE)</text:p>
        </text:list-item>
      </text:list>
      <text:h text:style-name="Heading_20_3" text:outline-level="3">Forces</text:h>
      <text:list text:style-name="L16">
        <text:list-item>
          <text:p text:style-name="P16">Observabilité</text:p>
        </text:list-item>
        <text:list-item>
          <text:p text:style-name="P16">Simplicité</text:p>
        </text:list-item>
        <text:list-item>
          <text:p text:style-name="P16">Compatibilité cluster</text:p>
        </text:list-item>
      </text:list>
      <text:h text:style-name="Heading_20_3" text:outline-level="3">Faiblesses</text:h>
      <text:list text:style-name="L17">
        <text:list-item>
          <text:p text:style-name="P17">Latence minimale imposée par le tick</text:p>
        </text:list-item>
      </text:list>
      <text:h text:style-name="Heading_20_3" text:outline-level="3"><text:soft-page-break/>Améliorations possibles</text:h>
      <text:list text:style-name="L18">
        <text:list-item>
          <text:p text:style-name="P18">Verrouillage logique par (user, wallet, decisionConfig)</text:p>
        </text:list-item>
        <text:list-item>
          <text:p text:style-name="P18">Clock abstraite pour backtest</text:p>
        </text:list-item>
      </text:list>
      <text:p text:style-name="Horizontal_20_Line"/>
      <text:h text:style-name="Heading_20_2" text:outline-level="2">7. Gestion de l’état, exécution des actions et suivi des positions</text:h>
      <text:h text:style-name="Heading_20_3" text:outline-level="3">Principe fondamental</text:h>
      <text:list text:style-name="L19">
        <text:list-item>
          <text:p text:style-name="P19">La Decision <text:span text:style-name="Strong_20_Emphasis">ne modifie jamais l’état</text:span></text:p>
        </text:list-item>
        <text:list-item>
          <text:p text:style-name="P19">Elle produit une intention</text:p>
        </text:list-item>
      </text:list>
      <text:h text:style-name="Heading_20_3" text:outline-level="3">Forces</text:h>
      <text:list text:style-name="L20">
        <text:list-item>
          <text:p text:style-name="P20">Décision pure</text:p>
        </text:list-item>
        <text:list-item>
          <text:p text:style-name="P20">Séparation claire action / observation</text:p>
        </text:list-item>
      </text:list>
      <text:h text:style-name="Heading_20_3" text:outline-level="3">Risques</text:h>
      <text:list text:style-name="L21">
        <text:list-item>
          <text:p text:style-name="P21">Complexité de la machine à états des positions</text:p>
        </text:list-item>
      </text:list>
      <text:h text:style-name="Heading_20_3" text:outline-level="3">Recommandations</text:h>
      <text:list text:style-name="L22">
        <text:list-item>
          <text:p text:style-name="P22">Introduire une couche dédiée <text:span text:style-name="Source_20_Text">ExecutionEngine</text:span></text:p>
        </text:list-item>
        <text:list-item>
          <text:p text:style-name="P22">Formaliser les follow-up actions (trailing stop, surveillance)</text:p>
        </text:list-item>
      </text:list>
      <text:p text:style-name="Horizontal_20_Line"/>
      <text:h text:style-name="Heading_20_2" text:outline-level="2">8. Historisation, traçabilité et auditabilité</text:h>
      <text:h text:style-name="Heading_20_3" text:outline-level="3">Objectif</text:h>
      <text:p text:style-name="Text_20_body">Pouvoir répondre à :</text:p>
      <text:p text:style-name="Quotations">« Pourquoi cette action a-t-elle été prise ? »</text:p>
      <text:h text:style-name="Heading_20_3" text:outline-level="3">Forces</text:h>
      <text:list text:style-name="L23">
        <text:list-item>
          <text:p text:style-name="P23">Debug avancé</text:p>
        </text:list-item>
        <text:list-item>
          <text:p text:style-name="P23">Transparence</text:p>
        </text:list-item>
      </text:list>
      <text:h text:style-name="Heading_20_3" text:outline-level="3">Faiblesses</text:h>
      <text:list text:style-name="L24">
        <text:list-item>
          <text:p text:style-name="P24">Volume de données important</text:p>
        </text:list-item>
      </text:list>
      <text:h text:style-name="Heading_20_3" text:outline-level="3">Recommandations</text:h>
      <text:list text:style-name="L25">
        <text:list-item>
          <text:p text:style-name="P25">Historiser par pipeline (Indicator → Strategy → Decision → Action)</text:p>
        </text:list-item>
        <text:list-item>
          <text:p text:style-name="P25"><text:soft-page-break/>Différencier snapshot métier et métriques dérivées</text:p>
        </text:list-item>
      </text:list>
      <text:p text:style-name="Horizontal_20_Line"/>
      <text:h text:style-name="Heading_20_2" text:outline-level="2">9. Backtesting et rejouabilité</text:h>
      <text:h text:style-name="Heading_20_3" text:outline-level="3">Choix structurants</text:h>
      <text:list text:style-name="L26">
        <text:list-item>
          <text:p text:style-name="P26">Même moteur que le live</text:p>
        </text:list-item>
        <text:list-item>
          <text:p text:style-name="P26">Sources de données différentes</text:p>
        </text:list-item>
      </text:list>
      <text:h text:style-name="Heading_20_3" text:outline-level="3">Forces</text:h>
      <text:list text:style-name="L27">
        <text:list-item>
          <text:p text:style-name="P27">Cohérence maximale</text:p>
        </text:list-item>
        <text:list-item>
          <text:p text:style-name="P27">Pas de double logique</text:p>
        </text:list-item>
      </text:list>
      <text:h text:style-name="Heading_20_3" text:outline-level="3">Faiblesses</text:h>
      <text:list text:style-name="L28">
        <text:list-item>
          <text:p text:style-name="P28">Exigence élevée sur la gestion du temps</text:p>
        </text:list-item>
      </text:list>
      <text:h text:style-name="Heading_20_3" text:outline-level="3">Recommandations</text:h>
      <text:list text:style-name="L29">
        <text:list-item>
          <text:p text:style-name="P29">Clock injectable partout</text:p>
        </text:list-item>
        <text:list-item>
          <text:p text:style-name="P29">MarketDataset strictement déterministe</text:p>
        </text:list-item>
      </text:list>
      <text:p text:style-name="Horizontal_20_Line"/>
      <text:h text:style-name="Heading_20_2" text:outline-level="2">10. Multi-utilisateur, multi-wallet et isolation des exécutions</text:h>
      <text:h text:style-name="Heading_20_3" text:outline-level="3">Règle clé</text:h>
      <text:p text:style-name="Text_20_body">Une Decision peut s’exécuter en parallèle <text:span text:style-name="Strong_20_Emphasis">uniquement si l’état est distinct</text:span>.</text:p>
      <text:h text:style-name="Heading_20_3" text:outline-level="3">Forces</text:h>
      <text:list text:style-name="L30">
        <text:list-item>
          <text:p text:style-name="P30">Scalabilité</text:p>
        </text:list-item>
        <text:list-item>
          <text:p text:style-name="P30">Sécurité</text:p>
        </text:list-item>
      </text:list>
      <text:h text:style-name="Heading_20_3" text:outline-level="3">Recommandations</text:h>
      <text:list text:style-name="L31">
        <text:list-item>
          <text:p text:style-name="P31">Isolation stricte par user / wallet</text:p>
        </text:list-item>
        <text:list-item>
          <text:p text:style-name="P31">Pas de parallélisme pour une même config sur un même wallet</text:p>
        </text:list-item>
      </text:list>
      <text:p text:style-name="Horizontal_20_Line"/>
      <text:h text:style-name="Heading_20_2" text:outline-level="2">11. Activation / désactivation et validation de cohérence</text:h>
      <text:h text:style-name="Heading_20_3" text:outline-level="3">Principe</text:h>
      <text:p text:style-name="Text_20_body">Mieux vaut désactiver que dégrader.</text:p>
      <text:h text:style-name="Heading_20_3" text:outline-level="3"><text:soft-page-break/>Forces</text:h>
      <text:list text:style-name="L32">
        <text:list-item>
          <text:p text:style-name="P32">Robustesse</text:p>
        </text:list-item>
        <text:list-item>
          <text:p text:style-name="P32">Prévisibilité</text:p>
        </text:list-item>
      </text:list>
      <text:h text:style-name="Heading_20_3" text:outline-level="3">Recommandations</text:h>
      <text:list text:style-name="L33">
        <text:list-item>
          <text:p text:style-name="P33">Désactivation en cascade</text:p>
        </text:list-item>
        <text:list-item>
          <text:p text:style-name="P33">Validation systématique à la résolution de config</text:p>
        </text:list-item>
      </text:list>
      <text:p text:style-name="Horizontal_20_Line"/>
      <text:h text:style-name="Heading_20_2" text:outline-level="2">12. Points d’attention sur MarketDatasetEngine et arbre de décision</text:h>
      <text:h text:style-name="Heading_20_3" text:outline-level="3">MarketDatasetEngine</text:h>
      <text:list text:style-name="L34">
        <text:list-item>
          <text:p text:style-name="P34">Point fort : centralisation et cache</text:p>
        </text:list-item>
        <text:list-item>
          <text:p text:style-name="P34">Attention :</text:p>
          <text:list>
            <text:list-item>
              <text:p text:style-name="P34">figer les datasets par exécution</text:p>
            </text:list-item>
            <text:list-item>
              <text:p text:style-name="P34">éviter toute requête dynamique en cours de calcul</text:p>
            </text:list-item>
          </text:list>
        </text:list-item>
      </text:list>
      <text:h text:style-name="Heading_20_3" text:outline-level="3">Arbre de décision</text:h>
      <text:list text:style-name="L35">
        <text:list-item>
          <text:p text:style-name="P35">Très bien positionné conceptuellement</text:p>
        </text:list-item>
        <text:list-item>
          <text:p text:style-name="P35">Veiller à :</text:p>
          <text:list>
            <text:list-item>
              <text:p text:style-name="P35">ne jamais introduire d’état</text:p>
            </text:list-item>
            <text:list-item>
              <text:p text:style-name="P35">garder des contrats clairs entre couches</text:p>
            </text:list-item>
          </text:list>
        </text:list-item>
      </text:list>
      <text:p text:style-name="Horizontal_20_Line"/>
      <text:h text:style-name="Heading_20_2" text:outline-level="2">13. Forces, faiblesses et risques identifiés</text:h>
      <text:h text:style-name="Heading_20_3" text:outline-level="3">Forces majeures</text:h>
      <text:list text:style-name="L36">
        <text:list-item>
          <text:p text:style-name="P36">Architecture propre et évolutive</text:p>
        </text:list-item>
        <text:list-item>
          <text:p text:style-name="P36">Backtest natif</text:p>
        </text:list-item>
        <text:list-item>
          <text:p text:style-name="P36">Explicabilité forte</text:p>
        </text:list-item>
      </text:list>
      <text:h text:style-name="Heading_20_3" text:outline-level="3">Faiblesses potentielles</text:h>
      <text:list text:style-name="L37">
        <text:list-item>
          <text:p text:style-name="P37">Complexité initiale</text:p>
        </text:list-item>
        <text:list-item>
          <text:p text:style-name="P37">Coût en stockage et en modélisation</text:p>
        </text:list-item>
      </text:list>
      <text:h text:style-name="Heading_20_3" text:outline-level="3"><text:soft-page-break/>Risques</text:h>
      <text:list text:style-name="L38">
        <text:list-item>
          <text:p text:style-name="P38">Glissement de responsabilités</text:p>
        </text:list-item>
        <text:list-item>
          <text:p text:style-name="P38">Sous-estimation de la gestion du temps</text:p>
        </text:list-item>
      </text:list>
      <text:p text:style-name="Horizontal_20_Line"/>
      <text:h text:style-name="Heading_20_2" text:outline-level="2">14. Recommandations et pistes d’amélioration</text:h>
      <text:list text:style-name="L39">
        <text:list-item>
          <text:p text:style-name="P39">Formaliser les contrats entre moteurs</text:p>
        </text:list-item>
        <text:list-item>
          <text:p text:style-name="P39">Documenter les règles d’architecture</text:p>
        </text:list-item>
        <text:list-item>
          <text:p text:style-name="P39">Introduire progressivement des métriques de performance (PnL, drawdown)</text:p>
        </text:list-item>
      </text:list>
      <text:p text:style-name="Horizontal_20_Line"/>
      <text:h text:style-name="Heading_20_2" text:outline-level="2">15. Conclusion</text:h>
      <text:p text:style-name="Text_20_body">L’architecture envisagée est saine, mature et alignée avec des moteurs de trading professionnels. Les choix effectués privilégient la robustesse, la rejouabilité et l’évolutivité au détriment d’une simplicité immédiate, ce qui est un choix pertinent pour un projet de cette ambition.</text:p>
      <text:p text:style-name="Text_20_body">La priorité doit rester la clarté des responsabilités et la discipline architecturale : c’est ce qui garantira la longévité et la qualité du systè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Synthèse (franche et pragmatique)</text:h>
      <text:p text:style-name="Text_20_body">👉 <text:span text:style-name="Strong_20_Emphasis">Commence par la gestion du Temps / Clock.</text:span><text:line-break/>Sans hésiter.</text:p>
      <text:p text:style-name="Text_20_body">C’est le <text:span text:style-name="Strong_20_Emphasis">socle invisible</text:span> sur lequel <text:span text:style-name="Emphasis">tout le reste</text:span> repose :</text:p>
      <text:list text:style-name="L40">
        <text:list-item>
          <text:p text:style-name="P40">backtesting</text:p>
        </text:list-item>
        <text:list-item>
          <text:p text:style-name="P40">versionning des résultats</text:p>
        </text:list-item>
        <text:list-item>
          <text:p text:style-name="P40">reproductibilité</text:p>
        </text:list-item>
        <text:list-item>
          <text:p text:style-name="P40">métriques de performance</text:p>
        </text:list-item>
        <text:list-item>
          <text:p text:style-name="P40">scheduler</text:p>
        </text:list-item>
        <text:list-item>
          <text:p text:style-name="P40">debug</text:p>
        </text:list-item>
      </text:list>
      <text:p text:style-name="Text_20_body">Si tu attaques autre chose avant, tu devras <text:span text:style-name="Strong_20_Emphasis">revenir casser</text:span>.</text:p>
      <text:p text:style-name="Horizontal_20_Line"/>
      <text:h text:style-name="Heading_20_2" text:outline-level="2">Pourquoi la Clock est le vrai point n°1</text:h>
      <text:h text:style-name="Heading_20_3" text:outline-level="3">1️⃣ Elle impacte déjà ton existant (sans que tu le voies)</text:h>
      <text:p text:style-name="Text_20_body">Aujourd’hui, quelque part dans ton code, il y a forcément :</text:p>
      <text:list text:style-name="L41">
        <text:list-item>
          <text:p text:style-name="P41"><text:span text:style-name="Source_20_Text">Instant.now()</text:span></text:p>
        </text:list-item>
        <text:list-item>
          <text:p text:style-name="P41"><text:span text:style-name="Source_20_Text">ZonedDateTime.now()</text:span></text:p>
        </text:list-item>
        <text:list-item>
          <text:p text:style-name="P41">ou équivalent</text:p>
        </text:list-item>
      </text:list>
      <text:p text:style-name="Text_20_body">👉 Tant que le temps est implicite :</text:p>
      <text:list text:style-name="L42">
        <text:list-item>
          <text:p text:style-name="P42">une Decision n’est <text:span text:style-name="Strong_20_Emphasis">pas rejouable</text:span></text:p>
        </text:list-item>
        <text:list-item>
          <text:p text:style-name="P42">un résultat n’est <text:span text:style-name="Strong_20_Emphasis">pas comparable</text:span></text:p>
        </text:list-item>
        <text:list-item>
          <text:p text:style-name="P42">un backtest est <text:span text:style-name="Strong_20_Emphasis">biaisé</text:span></text:p>
        </text:list-item>
      </text:list>
      <text:p text:style-name="Horizontal_20_Line"/>
      <text:h text:style-name="Heading_20_3" text:outline-level="3">2️⃣ Tous les sujets que tu cites en dépendent</text:h>
      <table:table table:name="Tableau1" table:style-name="Tableau1">
        <table:table-column table:style-name="Tableau1.A"/>
        <table:table-column table:style-name="Tableau1.B"/>
        <table:table-header-rows>
          <table:table-row>
            <table:table-cell table:style-name="Tableau1.A1" office:value-type="string">
              <text:p text:style-name="Table_20_Heading">Sujet</text:p>
            </table:table-cell>
            <table:table-cell table:style-name="Tableau1.A1" office:value-type="string">
              <text:p text:style-name="Table_20_Heading">Dépend de la Clock ?</text:p>
            </table:table-cell>
          </table:table-row>
        </table:table-header-rows>
        <table:table-row>
          <table:table-cell table:style-name="Tableau1.A1" office:value-type="string">
            <text:p text:style-name="Table_20_Contents">Versionning config</text:p>
          </table:table-cell>
          <table:table-cell table:style-name="Tableau1.A1" office:value-type="string">
            <text:p text:style-name="Table_20_Contents">✔️</text:p>
          </table:table-cell>
        </table:table-row>
        <table:table-row>
          <table:table-cell table:style-name="Tableau1.A1" office:value-type="string">
            <text:p text:style-name="Table_20_Contents">Backtesting</text:p>
          </table:table-cell>
          <table:table-cell table:style-name="Tableau1.A1" office:value-type="string">
            <text:p text:style-name="Table_20_Contents">✔️✔️✔️</text:p>
          </table:table-cell>
        </table:table-row>
        <table:table-row>
          <table:table-cell table:style-name="Tableau1.A1" office:value-type="string">
            <text:p text:style-name="Table_20_Contents">Scheduler</text:p>
          </table:table-cell>
          <table:table-cell table:style-name="Tableau1.A1" office:value-type="string">
            <text:p text:style-name="Table_20_Contents">✔️</text:p>
          </table:table-cell>
        </table:table-row>
        <table:table-row>
          <table:table-cell table:style-name="Tableau1.A1" office:value-type="string">
            <text:p text:style-name="Table_20_Contents">Historisation</text:p>
          </table:table-cell>
          <table:table-cell table:style-name="Tableau1.A1" office:value-type="string">
            <text:p text:style-name="Table_20_Contents">✔️</text:p>
          </table:table-cell>
        </table:table-row>
        <table:table-row>
          <table:table-cell table:style-name="Tableau1.A1" office:value-type="string">
            <text:p text:style-name="Table_20_Contents">Métriques PnL</text:p>
          </table:table-cell>
          <table:table-cell table:style-name="Tableau1.A1" office:value-type="string">
            <text:p text:style-name="Table_20_Contents">✔️</text:p>
          </table:table-cell>
        </table:table-row>
      </table:table>
      <text:p text:style-name="Text_20_body">👉 La Clock est <text:span text:style-name="Strong_20_Emphasis">transverse</text:span>, donc à traiter en premier.</text:p>
      <text:p text:style-name="Horizontal_20_Line"/>
      <text:h text:style-name="Heading_20_2" text:outline-level="2"><text:soft-page-break/>Pourquoi ne PAS commencer par le backtest</text:h>
      <text:p text:style-name="Text_20_body">C’est tentant… mais risqué.</text:p>
      <text:p text:style-name="Text_20_body">Sans Clock :</text:p>
      <text:list text:style-name="L43">
        <text:list-item>
          <text:p text:style-name="P43">tu vas simuler du marché passé</text:p>
        </text:list-item>
        <text:list-item>
          <text:p text:style-name="P43">avec une logique temps “live”</text:p>
        </text:list-item>
        <text:list-item>
          <text:p text:style-name="P43">donc avec des bugs subtils (fenêtres, horizons, trailing, etc.)</text:p>
        </text:list-item>
      </text:list>
      <text:p text:style-name="Text_20_body">👉 Tu ferais du backtest <text:span text:style-name="Strong_20_Emphasis">non fidèle</text:span>.</text:p>
      <text:p text:style-name="Horizontal_20_Line"/>
      <text:h text:style-name="Heading_20_2" text:outline-level="2">Ordre recommandé (très concret)</text:h>
      <text:h text:style-name="Heading_20_3" text:outline-level="3">🥇 Étape 1 — Introduire la notion de Temps (Clock)</text:h>
      <text:p text:style-name="Text_20_body">Objectifs :</text:p>
      <text:list text:style-name="L44">
        <text:list-item>
          <text:p text:style-name="P44"><text:span text:style-name="Strong_20_Emphasis">une seule source de temps</text:span></text:p>
        </text:list-item>
        <text:list-item>
          <text:p text:style-name="P44">injectable</text:p>
        </text:list-item>
        <text:list-item>
          <text:p text:style-name="P44">contrôlable</text:p>
        </text:list-item>
      </text:list>
      <text:p text:style-name="Text_20_body">Sans tout refactorer :</text:p>
      <text:list text:style-name="L45">
        <text:list-item>
          <text:p text:style-name="P45">une abstraction simple</text:p>
        </text:list-item>
        <text:list-item>
          <text:p text:style-name="P45">utilisée par :</text:p>
          <text:list>
            <text:list-item>
              <text:p text:style-name="P45">DecisionContext</text:p>
            </text:list-item>
            <text:list-item>
              <text:p text:style-name="P45">Scheduler</text:p>
            </text:list-item>
            <text:list-item>
              <text:p text:style-name="P45">MarketDatasetEngine (timestamps)</text:p>
            </text:list-item>
            <text:list-item>
              <text:p text:style-name="P45">Historisation</text:p>
            </text:list-item>
          </text:list>
        </text:list-item>
      </text:list>
      <text:p text:style-name="Horizontal_20_Line"/>
      <text:h text:style-name="Heading_20_3" text:outline-level="3">🥈 Étape 2 — Versionner Config + Résultats</text:h>
      <text:p text:style-name="Text_20_body">Pourquoi juste après :</text:p>
      <text:list text:style-name="L46">
        <text:list-item>
          <text:p text:style-name="P46">une fois le temps maîtrisé</text:p>
        </text:list-item>
        <text:list-item>
          <text:p text:style-name="P46">tu peux <text:span text:style-name="Strong_20_Emphasis">figer une exécution</text:span></text:p>
        </text:list-item>
      </text:list>
      <text:p text:style-name="Text_20_body">Tu peux alors dire :</text:p>
      <text:p text:style-name="Quotations">“À <text:span text:style-name="Emphasis">T</text:span>, avec <text:span text:style-name="Emphasis">Config v12</text:span>, voici ce qui s’est passé.”</text:p>
      <text:p text:style-name="Horizontal_20_Line"/>
      <text:h text:style-name="Heading_20_3" text:outline-level="3"><text:soft-page-break/>🥉 Étape 3 — Backtesting</text:h>
      <text:p text:style-name="Text_20_body">À ce stade :</text:p>
      <text:list text:style-name="L47">
        <text:list-item>
          <text:p text:style-name="P47">le moteur est stable</text:p>
        </text:list-item>
        <text:list-item>
          <text:p text:style-name="P47">le temps est maîtrisé</text:p>
        </text:list-item>
        <text:list-item>
          <text:p text:style-name="P47">les exécutions sont rejouables</text:p>
        </text:list-item>
      </text:list>
      <text:p text:style-name="Text_20_body">👉 Le backtest devient <text:span text:style-name="Strong_20_Emphasis">une exécution comme une autre</text:span>, pas un monde à part.</text:p>
      <text:p text:style-name="Horizontal_20_Line"/>
      <text:h text:style-name="Heading_20_3" text:outline-level="3">🏁 Étape 4 — Métriques de performance</text:h>
      <text:p text:style-name="Text_20_body">En dernier, naturellement :</text:p>
      <text:list text:style-name="L48">
        <text:list-item>
          <text:p text:style-name="P48">PnL</text:p>
        </text:list-item>
        <text:list-item>
          <text:p text:style-name="P48">drawdown</text:p>
        </text:list-item>
        <text:list-item>
          <text:p text:style-name="P48">ratios</text:p>
        </text:list-item>
      </text:list>
      <text:p text:style-name="Text_20_body">👉 Elles consomment :</text:p>
      <text:list text:style-name="L49">
        <text:list-item>
          <text:p text:style-name="P49">des exécutions</text:p>
        </text:list-item>
        <text:list-item>
          <text:p text:style-name="P49">des actions</text:p>
        </text:list-item>
        <text:list-item>
          <text:p text:style-name="P49">du temps</text:p>
        </text:list-item>
      </text:list>
      <text:p text:style-name="Horizontal_20_Line"/>
      <text:h text:style-name="Heading_20_2" text:outline-level="2">Signal important (je préfère être clair)</text:h>
      <text:p text:style-name="Text_20_body">Si tu devais ignorer ce conseil et commencer par autre chose :</text:p>
      <text:list text:style-name="L50">
        <text:list-item>
          <text:p text:style-name="P50">la Clock te reviendra <text:span text:style-name="Strong_20_Emphasis">comme une dette</text:span></text:p>
        </text:list-item>
        <text:list-item>
          <text:p text:style-name="P50">et elle sera <text:span text:style-name="Strong_20_Emphasis">plus douloureuse à intégrer</text:span> plus tard</text:p>
        </text:list-item>
      </text:list>
      <text:p text:style-name="Text_20_body">Tu as la chance d’y penser <text:span text:style-name="Strong_20_Emphasis">avant</text:span> le backtest → profite-en.</text:p>
      <text:p text:style-name="Horizontal_20_Line"/>
      <text:h text:style-name="Heading_20_2" text:outline-level="2">Ce que je te propose maintenant</text:h>
      <text:p text:style-name="Text_20_body">Si tu veux, au prochain échange, on peut :</text:p>
      <text:list text:style-name="L51">
        <text:list-item>
          <text:p text:style-name="P51"><text:span text:style-name="Strong_20_Emphasis">poser le design exact de la Clock</text:span></text:p>
          <text:list>
            <text:list-item>
              <text:p text:style-name="P51">live</text:p>
            </text:list-item>
            <text:list-item>
              <text:p text:style-name="P51">backtest</text:p>
            </text:list-item>
            <text:list-item>
              <text:p text:style-name="P51">scheduler</text:p>
            </text:list-item>
          </text:list>
        </text:list-item>
        <text:list-item>
          <text:p text:style-name="P51"><text:span text:style-name="Strong_20_Emphasis">lister tous les endroits où le temps intervient</text:span></text:p>
        </text:list-item>
        <text:list-item>
          <text:p text:style-name="P51">définir <text:span text:style-name="Strong_20_Emphasis">les règles à ne jamais violer</text:span></text:p>
        </text:list-item>
      </text:list>
      <text:p text:style-name="Text_20_body"><text:soft-page-break/><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oft-page-break/><text:span text:style-name="Emphasis"/></text:p>
      <text:p text:style-name="Text_20_body"><text:span text:style-name="Emphasis">Bien vu 👍<text:line-break/>👉 </text:span><text:span text:style-name="Emphasis"><text:span text:style-name="Strong_20_Emphasis">ML = </text:span></text:span><text:span text:style-name="Strong_20_Emphasis"><text:span text:style-name="Emphasis">Machine Learning</text:span></text:span><text:span text:style-name="Emphasis"> (apprentissage automatique).<text:line-break/>Je ferai l’effort systématiquement à la première occurrence, promis.</text:span></text:p>
      <text:p text:style-name="P52"/>
      <text:h text:style-name="P53" text:outline-level="2">Cycle complet : <text:span text:style-name="Emphasis">MarketOpinion → Scenario → Action → Feedback</text:span></text:h>
      <text:p text:style-name="Text_20_body">Je te le pose <text:span text:style-name="Strong_20_Emphasis">simple, lisible, sans magie</text:span>, et extensible plus tard vers du Machine Learning si tu le souhaites.</text:p>
      <text:p text:style-name="P52"/>
      <text:h text:style-name="P54" text:outline-level="3">1️⃣ Ingestion → <text:span text:style-name="Emphasis">MarketOpinion</text:span></text:h>
      <text:p text:style-name="Text_20_body"><text:span text:style-name="Strong_20_Emphasis">Sources possibles</text:span> (hétérogènes mais normalisées) :</text:p>
      <text:list text:style-name="L52">
        <text:list-item>
          <text:p text:style-name="P55">indicateurs techniques (RSI, MACD, volatilité…)</text:p>
        </text:list-item>
        <text:list-item>
          <text:p text:style-name="P55">macro (taux, DXY, liquidité globale…)</text:p>
        </text:list-item>
        <text:list-item>
          <text:p text:style-name="P55">on-chain</text:p>
        </text:list-item>
        <text:list-item>
          <text:p text:style-name="P55">news / sentiment</text:p>
        </text:list-item>
        <text:list-item>
          <text:p text:style-name="P55">(plus tard) LLM</text:p>
        </text:list-item>
      </text:list>
      <text:p text:style-name="Text_20_body">👉 <text:span text:style-name="Strong_20_Emphasis">Tout est aplati en </text:span><text:span text:style-name="Strong_20_Emphasis"><text:span text:style-name="Source_20_Text">MarketOpinion</text:span></text:span><text:line-break/>C’est ta <text:span text:style-name="Emphasis">lingua franca</text:span>.</text:p>
      <text:p text:style-name="P56"><text:span text:style-name="Source_20_Text">MarketOpinion {</text:span></text:p>
      <text:p text:style-name="P56"><text:span text:style-name="Source_20_Text"><text:s text:c="2"/>source</text:span></text:p>
      <text:p text:style-name="P56"><text:span text:style-name="Source_20_Text"><text:s text:c="2"/>scope <text:s text:c="7"/>// GLOBAL, ASSET, PAIR</text:span></text:p>
      <text:p text:style-name="P56"><text:span text:style-name="Source_20_Text"><text:s text:c="2"/>asset <text:s text:c="7"/>// BTC, ETH, null si GLOBAL</text:span></text:p>
      <text:p text:style-name="P56"><text:span text:style-name="Source_20_Text"><text:s text:c="2"/>timeframe</text:span></text:p>
      <text:p text:style-name="P56"><text:span text:style-name="Source_20_Text"><text:s text:c="2"/>direction <text:s text:c="3"/>// BULLISH / BEARISH / NEUTRAL</text:span></text:p>
      <text:p text:style-name="P56"><text:span text:style-name="Source_20_Text"><text:s text:c="2"/>confidence <text:s text:c="2"/>// 0..1</text:span></text:p>
      <text:p text:style-name="P56"><text:span text:style-name="Source_20_Text"><text:s text:c="2"/>ttl</text:span></text:p>
      <text:p text:style-name="P56"><text:span text:style-name="Source_20_Text">}</text:span></text:p>
      <text:p text:style-name="Text_20_body">Aucune logique métier ici. Juste des faits interprétés.</text:p>
      <text:p text:style-name="P52"/>
      <text:h text:style-name="P54" text:outline-level="3">2️⃣ Agrégation → <text:span text:style-name="Emphasis">ScenarioEngine</text:span></text:h>
      <text:p text:style-name="Text_20_body">Le <text:span text:style-name="Source_20_Text">ScenarioEngine</text:span> :</text:p>
      <text:list text:style-name="L53">
        <text:list-item>
          <text:p text:style-name="P57">récupère les opinions actives</text:p>
        </text:list-item>
        <text:list-item>
          <text:p text:style-name="P57">les <text:span text:style-name="Strong_20_Emphasis">regroupe dynamiquement</text:span></text:p>
        </text:list-item>
        <text:list-item>
          <text:p text:style-name="P57"><text:soft-page-break/>produit des <text:span text:style-name="Strong_20_Emphasis">scénarios candidats</text:span></text:p>
        </text:list-item>
      </text:list>
      <text:p text:style-name="Text_20_body">Un scénario est :</text:p>
      <text:p text:style-name="P58">une hypothèse de marché <text:span text:style-name="Strong_20_Emphasis">cohérente à l’instant T</text:span></text:p>
      <text:p text:style-name="P56"><text:span text:style-name="Source_20_Text">Scenario {</text:span></text:p>
      <text:p text:style-name="P56"><text:span text:style-name="Source_20_Text"><text:s text:c="2"/>id</text:span></text:p>
      <text:p text:style-name="P56"><text:span text:style-name="Source_20_Text"><text:s text:c="2"/>scope</text:span></text:p>
      <text:p text:style-name="P56"><text:span text:style-name="Source_20_Text"><text:s text:c="2"/>asset</text:span></text:p>
      <text:p text:style-name="P56"><text:span text:style-name="Source_20_Text"><text:s text:c="2"/>direction</text:span></text:p>
      <text:p text:style-name="P56"><text:span text:style-name="Source_20_Text"><text:s text:c="2"/>opinions[]</text:span></text:p>
      <text:p text:style-name="P56"><text:span text:style-name="Source_20_Text"><text:s text:c="2"/>credibilityScore</text:span></text:p>
      <text:p text:style-name="P56"><text:span text:style-name="Source_20_Text"><text:s text:c="2"/>stabilityScore</text:span></text:p>
      <text:p text:style-name="P56"><text:span text:style-name="Source_20_Text"><text:s text:c="2"/>age</text:span></text:p>
      <text:p text:style-name="P56"><text:span text:style-name="Source_20_Text">}</text:span></text:p>
      <text:p text:style-name="Text_20_body">Pas d’action ici.<text:line-break/>Juste : <text:span text:style-name="Emphasis">“voici ce qui semble se dessiner”</text:span>.</text:p>
      <text:p text:style-name="P52"/>
      <text:h text:style-name="P54" text:outline-level="3">3️⃣ Évaluation → <text:span text:style-name="Emphasis">Decision Layer</text:span></text:h>
      <text:p text:style-name="Text_20_body">C’est ici que ton ancien <text:span text:style-name="Source_20_Text">DecisionResult</text:span> trouve sa vraie place.</text:p>
      <text:p text:style-name="Text_20_body">Chaque scénario est évalué <text:span text:style-name="Strong_20_Emphasis">dans un contexte</text:span> :</text:p>
      <text:list text:style-name="L54">
        <text:list-item>
          <text:p text:style-name="P59">état du wallet</text:p>
        </text:list-item>
        <text:list-item>
          <text:p text:style-name="P59">exposition</text:p>
        </text:list-item>
        <text:list-item>
          <text:p text:style-name="P59">règles de risque</text:p>
        </text:list-item>
        <text:list-item>
          <text:p text:style-name="P59">drawdown actuel</text:p>
        </text:list-item>
        <text:list-item>
          <text:p text:style-name="P59">volatilité</text:p>
        </text:list-item>
      </text:list>
      <text:p text:style-name="Text_20_body">Résultat :</text:p>
      <text:p text:style-name="P56"><text:span text:style-name="Source_20_Text">DecisionResult {</text:span></text:p>
      <text:p text:style-name="P56"><text:span text:style-name="Source_20_Text"><text:s text:c="2"/>scenarioId</text:span></text:p>
      <text:p text:style-name="P56"><text:span text:style-name="Source_20_Text"><text:s text:c="2"/>action <text:s text:c="7"/>// BUY / SELL / HOLD / ADJUST / SUSPEND</text:span></text:p>
      <text:p text:style-name="P56"><text:span text:style-name="Source_20_Text"><text:s text:c="2"/>confidence</text:span></text:p>
      <text:p text:style-name="P56"><text:span text:style-name="Source_20_Text"><text:s text:c="2"/>reason</text:span></text:p>
      <text:p text:style-name="P56"><text:span text:style-name="Source_20_Text">}</text:span></text:p>
      <text:p text:style-name="Text_20_body">👉 <text:span text:style-name="Strong_20_Emphasis">Important</text:span><text:line-break/>Plusieurs scénarios peuvent produire :</text:p>
      <text:list text:style-name="L55">
        <text:list-item>
          <text:p text:style-name="P60">des décisions contradictoires</text:p>
        </text:list-item>
        <text:list-item>
          <text:p text:style-name="P60">ou aucune décision exploitable</text:p>
        </text:list-item>
      </text:list>
      <text:p text:style-name="Text_20_body"><text:soft-page-break/>Un arbitrage final peut exister, mais ce n’est pas obligatoire au début.</text:p>
      <text:p text:style-name="P52"/>
      <text:h text:style-name="P54" text:outline-level="3">4️⃣ Exécution → <text:span text:style-name="Emphasis">Action / Surveillance</text:span></text:h>
      <text:p text:style-name="Text_20_body">Deux cas :</text:p>
      <text:h text:style-name="P61" text:outline-level="4">🔹 Action instantanée</text:h>
      <text:list text:style-name="L56">
        <text:list-item>
          <text:p text:style-name="P62">ordre marché / limit</text:p>
        </text:list-item>
        <text:list-item>
          <text:p text:style-name="P62">ajustement de stop</text:p>
        </text:list-item>
        <text:list-item>
          <text:p text:style-name="P62">rééquilibrage</text:p>
        </text:list-item>
      </text:list>
      <text:h text:style-name="P61" text:outline-level="4">🔹 Action longue (surveillance)</text:h>
      <text:list text:style-name="L57">
        <text:list-item>
          <text:p text:style-name="P63">“si invalidation du scénario → agir”</text:p>
        </text:list-item>
        <text:list-item>
          <text:p text:style-name="P63">“si renforcement → augmenter l’exposition”</text:p>
        </text:list-item>
        <text:list-item>
          <text:p text:style-name="P63">“si breakout confirmé → déclencher”</text:p>
        </text:list-item>
      </text:list>
      <text:p text:style-name="Text_20_body">👉 Une action peut <text:span text:style-name="Strong_20_Emphasis">créer de nouvelles opinions</text:span><text:line-break/>(ex. “breakout confirmé”, “rejet violent”).</text:p>
      <text:p text:style-name="P52"/>
      <text:h text:style-name="P54" text:outline-level="3">5️⃣ Feedback → <text:span text:style-name="Emphasis">Learning Loop (sans ML au début)</text:span></text:h>
      <text:p text:style-name="Text_20_body">Après coup :</text:p>
      <text:list text:style-name="L58">
        <text:list-item>
          <text:p text:style-name="P64">PnL</text:p>
        </text:list-item>
        <text:list-item>
          <text:p text:style-name="P64">drawdown évité ou subi</text:p>
        </text:list-item>
        <text:list-item>
          <text:p text:style-name="P64">stabilité du scénario</text:p>
        </text:list-item>
        <text:list-item>
          <text:p text:style-name="P64">timing</text:p>
        </text:list-item>
      </text:list>
      <text:p text:style-name="Text_20_body">Ces métriques alimentent :</text:p>
      <text:list text:style-name="L59">
        <text:list-item>
          <text:p text:style-name="P65">la crédibilité future du scénario</text:p>
        </text:list-item>
        <text:list-item>
          <text:p text:style-name="P65">le poids des sources d’opinion</text:p>
        </text:list-item>
        <text:list-item>
          <text:p text:style-name="P65">la confiance des décisions</text:p>
        </text:list-item>
      </text:list>
      <text:p text:style-name="Text_20_body">⚠️ Pas de Machine Learning ici encore.<text:line-break/>Juste des <text:span text:style-name="Strong_20_Emphasis">scores historiques cumulés</text:span>.</text:p>
      <text:p text:style-name="P52"/>
      <text:h text:style-name="P53" text:outline-level="2">Où intervient le Machine Learning (plus tard, si besoin)</text:h>
      <text:p text:style-name="Text_20_body">Quand tu en parleras, on parlera de :</text:p>
      <text:list text:style-name="L60">
        <text:list-item>
          <text:p text:style-name="P66">prédire la survie d’un scénario</text:p>
        </text:list-item>
        <text:list-item>
          <text:p text:style-name="P66">pondérer automatiquement les sources</text:p>
        </text:list-item>
        <text:list-item>
          <text:p text:style-name="P66">détecter des clusters non évidents</text:p>
        </text:list-item>
      </text:list>
      <text:p text:style-name="Text_20_body"><text:soft-page-break/>Mais <text:span text:style-name="Strong_20_Emphasis">le cycle reste identique</text:span>.<text:line-break/>Tu changes juste la manière de calculer certains scores.</text:p>
      <text:p text:style-name="P52"/>
      <text:h text:style-name="P53" text:outline-level="2">Pourquoi ce cycle est solide</text:h>
      <text:list text:style-name="L61">
        <text:list-item>
          <text:p text:style-name="P67">chaque étape a une responsabilité claire</text:p>
        </text:list-item>
        <text:list-item>
          <text:p text:style-name="P67">aucune dépendance externe critique</text:p>
        </text:list-item>
        <text:list-item>
          <text:p text:style-name="P67">tout est observable, testable, backtestable</text:p>
        </text:list-item>
        <text:list-item>
          <text:p text:style-name="P67">tu peux t’arrêter à n’importe quel niveau et avoir un système cohérent</text:p>
        </text:list-item>
      </text:list>
      <text:p text:style-name="P52"/>
      <text:h text:style-name="P54" text:outline-level="3">Prochaine étape naturelle</text:h>
      <text:p text:style-name="Text_20_body">Je te propose pour la suite :</text:p>
      <text:list text:style-name="L62">
        <text:list-item>
          <text:p text:style-name="P68">soit <text:span text:style-name="Strong_20_Emphasis">formaliser précisément </text:span><text:span text:style-name="Strong_20_Emphasis"><text:span text:style-name="Source_20_Text">ScenarioEngine</text:span></text:span></text:p>
        </text:list-item>
        <text:list-item>
          <text:p text:style-name="P68">soit <text:span text:style-name="Strong_20_Emphasis">figer les contrats (interfaces)</text:span></text:p>
        </text:list-item>
        <text:list-item>
          <text:p text:style-name="P68">soit <text:span text:style-name="Strong_20_Emphasis">prendre un exemple concret (BTC) et le faire vivre dans le cycle</text:span></text:p>
        </text:list-item>
      </text:list>
      <text:p text:style-name="Text_20_body">À toi de choisir la suite 👌</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oft-page-break/><text:span text:style-name="Emphasis"/></text:p>
      <text:p text:style-name="Text_20_body"><text:span text:style-name="Emphasis">Parfait. On attaque </text:span><text:span text:style-name="Emphasis"><text:span text:style-name="Strong_20_Emphasis">le cœur vivant</text:span></text:span><text:span text:style-name="Emphasis"> du système : </text:span><text:span text:style-name="Emphasis"><text:span text:style-name="Strong_20_Emphasis"><text:span text:style-name="Source_20_Text">ScenarioEngine</text:span></text:span></text:span><text:span text:style-name="Emphasis">.<text:line-break/>Je vais être </text:span><text:span text:style-name="Emphasis"><text:span text:style-name="Strong_20_Emphasis">structuré, concret</text:span></text:span><text:span text:style-name="Emphasis">, et rester </text:span><text:span text:style-name="Emphasis"><text:span text:style-name="Strong_20_Emphasis">aligné avec ton existant</text:span></text:span><text:span text:style-name="Emphasis">.</text:span></text:p>
      <text:p text:style-name="P52"/>
      <text:h text:style-name="P69" text:outline-level="1">🎯 Rôle du <text:span text:style-name="Source_20_Text">ScenarioEngine</text:span></text:h>
      <text:p text:style-name="Text_20_body">Le <text:span text:style-name="Source_20_Text">ScenarioEngine</text:span> est <text:span text:style-name="Strong_20_Emphasis">le chef d’orchestre des scénarios</text:span>.</text:p>
      <text:p text:style-name="Text_20_body">👉 Il ne calcule pas le marché.<text:line-break/>👉 Il <text:span text:style-name="Strong_20_Emphasis">observe l’évolution des MarketOpinionResult dans le temps</text:span> et décide :</text:p>
      <text:list text:style-name="L63">
        <text:list-item>
          <text:p text:style-name="P70">quels scénarios <text:span text:style-name="Strong_20_Emphasis">naissent</text:span></text:p>
        </text:list-item>
        <text:list-item>
          <text:p text:style-name="P70">lesquels <text:span text:style-name="Strong_20_Emphasis">se renforcent</text:span></text:p>
        </text:list-item>
        <text:list-item>
          <text:p text:style-name="P70">lesquels <text:span text:style-name="Strong_20_Emphasis">mutent</text:span></text:p>
        </text:list-item>
        <text:list-item>
          <text:p text:style-name="P70">lesquels <text:span text:style-name="Strong_20_Emphasis">meurent</text:span></text:p>
        </text:list-item>
        <text:list-item>
          <text:p text:style-name="P70">lesquels sont <text:span text:style-name="Strong_20_Emphasis">éligibles à une ActionIntent</text:span></text:p>
        </text:list-item>
      </text:list>
      <text:p text:style-name="P52"/>
      <text:h text:style-name="P69" text:outline-level="1">🧠 Responsabilités EXACTES</text:h>
      <text:h text:style-name="P53" text:outline-level="2">1️⃣ Création dynamique</text:h>
      <text:p text:style-name="Text_20_body"><text:span text:style-name="Strong_20_Emphasis">Quand créer un scénario ?</text:span></text:p>
      <text:p text:style-name="Text_20_body">À chaque nouvelle <text:span text:style-name="Source_20_Text">MarketOpinionResult</text:span>, l’engine se pose la question :</text:p>
      <text:p text:style-name="P58"><text:span text:style-name="Emphasis">« Est-ce que cette opinion peut alimenter un scénario existant ?<text:line-break/>Sinon, mérite-t-elle la création d’un nouveau scénario ? »</text:span></text:p>
      <text:h text:style-name="P54" text:outline-level="3">Règle saine (simple au départ)</text:h>
      <text:list text:style-name="L64">
        <text:list-item>
          <text:p text:style-name="P71">si aucun scénario actif n’est <text:span text:style-name="Strong_20_Emphasis">compatible</text:span> → création</text:p>
        </text:list-item>
        <text:list-item>
          <text:p text:style-name="P71">sinon → rattachement au(x) scénario(s) compatible(s)</text:p>
        </text:list-item>
      </text:list>
      <text:p text:style-name="Text_20_body">👉 Compatible =</text:p>
      <text:list text:style-name="L65">
        <text:list-item>
          <text:p text:style-name="P72">même <text:span text:style-name="Source_20_Text">symbol</text:span></text:p>
        </text:list-item>
        <text:list-item>
          <text:p text:style-name="P72">même <text:span text:style-name="Source_20_Text">timeframe</text:span></text:p>
        </text:list-item>
        <text:list-item>
          <text:p text:style-name="P72">même <text:span text:style-name="Strong_20_Emphasis">direction dominante</text:span> (<text:span text:style-name="Source_20_Text">weightedSignal</text:span>)</text:p>
        </text:list-item>
        <text:list-item>
          <text:p text:style-name="P72">pas déjà invalidé</text:p>
        </text:list-item>
      </text:list>
      <text:p text:style-name="P52"/>
      <text:h text:style-name="P53" text:outline-level="2">2️⃣ Concurrence entre scénarios</text:h>
      <text:p text:style-name="Text_20_body">Plusieurs scénarios peuvent coexister <text:span text:style-name="Strong_20_Emphasis">sur le même actif</text:span>.</text:p>
      <text:p text:style-name="Text_20_body"><text:soft-page-break/>Exemples :</text:p>
      <text:list text:style-name="L66">
        <text:list-item>
          <text:p text:style-name="P73">scénario <text:span text:style-name="Strong_20_Emphasis">cassure haussière</text:span></text:p>
        </text:list-item>
        <text:list-item>
          <text:p text:style-name="P73">scénario <text:span text:style-name="Strong_20_Emphasis">range / faux breakout</text:span></text:p>
        </text:list-item>
        <text:list-item>
          <text:p text:style-name="P73">scénario <text:span text:style-name="Strong_20_Emphasis">retournement baissier</text:span></text:p>
        </text:list-item>
      </text:list>
      <text:h text:style-name="P54" text:outline-level="3">Le moteur doit permettre :</text:h>
      <text:list text:style-name="L67">
        <text:list-item>
          <text:p text:style-name="P74">coexistence</text:p>
        </text:list-item>
        <text:list-item>
          <text:p text:style-name="P74">comparaison</text:p>
        </text:list-item>
        <text:list-item>
          <text:p text:style-name="P74">priorisation</text:p>
        </text:list-item>
      </text:list>
      <text:p text:style-name="Text_20_body">👉 <text:span text:style-name="Strong_20_Emphasis">Aucune élimination prématurée</text:span></text:p>
      <text:p text:style-name="Text_20_body">La sélection finale se fait sur :</text:p>
      <text:list text:style-name="L68">
        <text:list-item>
          <text:p text:style-name="P75"><text:span text:style-name="Source_20_Text">ScenarioState</text:span></text:p>
        </text:list-item>
        <text:list-item>
          <text:p text:style-name="P75">confiance</text:p>
        </text:list-item>
        <text:list-item>
          <text:p text:style-name="P75">fraîcheur</text:p>
        </text:list-item>
        <text:list-item>
          <text:p text:style-name="P75">cohérence récente</text:p>
        </text:list-item>
      </text:list>
      <text:p text:style-name="P52"/>
      <text:h text:style-name="P53" text:outline-level="2">3️⃣ Mutation (clé de ton intuition 👌)</text:h>
      <text:p text:style-name="Text_20_body">Un scénario peut <text:span text:style-name="Strong_20_Emphasis">évoluer sans mourir</text:span>.</text:p>
      <text:p text:style-name="Text_20_body">Exemples :</text:p>
      <text:list text:style-name="L69">
        <text:list-item>
          <text:p text:style-name="P76">BULLISH faible → BULLISH fort</text:p>
        </text:list-item>
        <text:list-item>
          <text:p text:style-name="P76">BULLISH → NEUTRAL (pause)</text:p>
        </text:list-item>
        <text:list-item>
          <text:p text:style-name="P76">scénario X → X’ (raffinement)</text:p>
        </text:list-item>
      </text:list>
      <text:h text:style-name="P54" text:outline-level="3">Comment ?</text:h>
      <text:p text:style-name="Text_20_body">Par <text:span text:style-name="Strong_20_Emphasis">observation répétée</text:span> :</text:p>
      <text:list text:style-name="L70">
        <text:list-item>
          <text:p text:style-name="P77">même direction → renforcement</text:p>
        </text:list-item>
        <text:list-item>
          <text:p text:style-name="P77">direction opposée → affaiblissement</text:p>
        </text:list-item>
        <text:list-item>
          <text:p text:style-name="P77">oscillation → mutation (nouvelle hypothèse)</text:p>
        </text:list-item>
      </text:list>
      <text:p text:style-name="Text_20_body">👉 Techniquement :</text:p>
      <text:list text:style-name="L71">
        <text:list-item>
          <text:p text:style-name="P78">un scénario peut :</text:p>
          <text:list>
            <text:list-item>
              <text:p text:style-name="P78">changer d’état</text:p>
            </text:list-item>
            <text:list-item>
              <text:p text:style-name="P78">ajuster sa confiance</text:p>
            </text:list-item>
            <text:list-item>
              <text:p text:style-name="P78">changer sa “forme” interne</text:p>
            </text:list-item>
          </text:list>
        </text:list-item>
        <text:list-item>
          <text:p text:style-name="P78"><text:span text:style-name="Strong_20_Emphasis">sans changer d’ID</text:span> (important pour l’historique)</text:p>
        </text:list-item>
      </text:list>
      <text:p text:style-name="P52"><text:soft-page-break/></text:p>
      <text:h text:style-name="P53" text:outline-level="2">4️⃣ Expiration / Invalidation</text:h>
      <text:p text:style-name="Text_20_body">Deux fins possibles :</text:p>
      <text:h text:style-name="P54" text:outline-level="3">❌ Invalidation</text:h>
      <text:list text:style-name="L72">
        <text:list-item>
          <text:p text:style-name="P79">contradiction forte</text:p>
        </text:list-item>
        <text:list-item>
          <text:p text:style-name="P79">rupture logique</text:p>
        </text:list-item>
        <text:list-item>
          <text:p text:style-name="P79">opinion opposée avec forte conviction</text:p>
        </text:list-item>
      </text:list>
      <text:p text:style-name="Text_20_body">👉 état → <text:span text:style-name="Source_20_Text">INVALIDATED</text:span></text:p>
      <text:h text:style-name="P54" text:outline-level="3">🕰️ Expiration</text:h>
      <text:list text:style-name="L73">
        <text:list-item>
          <text:p text:style-name="P80">trop ancien</text:p>
        </text:list-item>
        <text:list-item>
          <text:p text:style-name="P80">plus alimenté</text:p>
        </text:list-item>
        <text:list-item>
          <text:p text:style-name="P80">contexte dépassé</text:p>
        </text:list-item>
      </text:list>
      <text:p text:style-name="Text_20_body">👉 état → <text:span text:style-name="Source_20_Text">EXPIRED</text:span></text:p>
      <text:p text:style-name="Text_20_body">👉 <text:span text:style-name="Strong_20_Emphasis">Différence cruciale pour le backtest</text:span></text:p>
      <text:p text:style-name="P52"/>
      <text:h text:style-name="P69" text:outline-level="1">🧩 Interface <text:span text:style-name="Source_20_Text">ScenarioEngine</text:span></text:h>
      <text:p text:style-name="P56"><text:span text:style-name="Source_20_Text">public interface ScenarioEngine {</text:span></text:p>
      <text:p text:style-name="P56"/>
      <text:p text:style-name="P56"><text:span text:style-name="Source_20_Text"><text:s text:c="4"/>/**</text:span></text:p>
      <text:p text:style-name="P56"><text:span text:style-name="Source_20_Text"><text:s text:c="5"/>* Injection d’une nouvelle opinion de marché.</text:span></text:p>
      <text:p text:style-name="P56"><text:span text:style-name="Source_20_Text"><text:s text:c="5"/>* Peut créer, mettre à jour, invalider ou expirer des scénarios.</text:span></text:p>
      <text:p text:style-name="P56"><text:span text:style-name="Source_20_Text"><text:s text:c="5"/>*/</text:span></text:p>
      <text:p text:style-name="P56"><text:span text:style-name="Source_20_Text"><text:s text:c="4"/>void onMarketOpinion(</text:span></text:p>
      <text:p text:style-name="P56"><text:span text:style-name="Source_20_Text"><text:s text:c="12"/>MarketOpinionResult opinion,</text:span></text:p>
      <text:p text:style-name="P56"><text:span text:style-name="Source_20_Text"><text:s text:c="12"/>ScenarioContext context</text:span></text:p>
      <text:p text:style-name="P56"><text:span text:style-name="Source_20_Text"><text:s text:c="4"/>);</text:span></text:p>
      <text:p text:style-name="P56"/>
      <text:p text:style-name="P56"><text:span text:style-name="Source_20_Text"><text:s text:c="4"/>/**</text:span></text:p>
      <text:p text:style-name="P56"><text:span text:style-name="Source_20_Text"><text:s text:c="5"/>* Tous les scénarios actifs (EMERGING / CONFIRMING / VALIDATED)</text:span></text:p>
      <text:p text:style-name="P56"><text:span text:style-name="Source_20_Text"><text:s text:c="5"/>*/</text:span></text:p>
      <text:p text:style-name="P56"><text:span text:style-name="Source_20_Text"><text:s text:c="4"/>List&lt;MarketScenario&gt; getActiveScenarios();</text:span></text:p>
      <text:p text:style-name="P56"/>
      <text:p text:style-name="P56"><text:span text:style-name="Source_20_Text"><text:s text:c="4"/>/**</text:span></text:p>
      <text:p text:style-name="P56"><text:soft-page-break/><text:span text:style-name="Source_20_Text"><text:s text:c="5"/>* Scénarios prêts à proposer une intention d’action</text:span></text:p>
      <text:p text:style-name="P56"><text:span text:style-name="Source_20_Text"><text:s text:c="5"/>*/</text:span></text:p>
      <text:p text:style-name="P56"><text:span text:style-name="Source_20_Text"><text:s text:c="4"/>List&lt;ActionIntent&gt; collectActionIntents();</text:span></text:p>
      <text:p text:style-name="P56"/>
      <text:p text:style-name="P56"><text:span text:style-name="Source_20_Text"><text:s text:c="4"/>/**</text:span></text:p>
      <text:p text:style-name="P56"><text:span text:style-name="Source_20_Text"><text:s text:c="5"/>* Nettoyage explicite (expiration, purge)</text:span></text:p>
      <text:p text:style-name="P56"><text:span text:style-name="Source_20_Text"><text:s text:c="5"/>*/</text:span></text:p>
      <text:p text:style-name="P56"><text:span text:style-name="Source_20_Text"><text:s text:c="4"/>void cleanup(Instant now);</text:span></text:p>
      <text:p text:style-name="P56"><text:span text:style-name="Source_20_Text">}</text:span></text:p>
      <text:p text:style-name="P52"/>
      <text:h text:style-name="P69" text:outline-level="1">🔁 Cycle complet (très important)</text:h>
      <text:p text:style-name="P56"><text:span text:style-name="Source_20_Text">MarketOpinionResult arrive</text:span></text:p>
      <text:p text:style-name="P56"><text:span text:style-name="Source_20_Text"><text:s text:c="8"/>↓</text:span></text:p>
      <text:p text:style-name="P56"><text:span text:style-name="Source_20_Text">ScenarioEngine.onMarketOpinion</text:span></text:p>
      <text:p text:style-name="P56"><text:span text:style-name="Source_20_Text"><text:s text:c="8"/>↓</text:span></text:p>
      <text:p text:style-name="P56"><text:span text:style-name="Source_20_Text">- rattachement OU création</text:span></text:p>
      <text:p text:style-name="P56"><text:span text:style-name="Source_20_Text">- évolution d’état</text:span></text:p>
      <text:p text:style-name="P56"><text:span text:style-name="Source_20_Text">- mutation / invalidation</text:span></text:p>
      <text:p text:style-name="P56"><text:span text:style-name="Source_20_Text"><text:s text:c="8"/>↓</text:span></text:p>
      <text:p text:style-name="P56"><text:span text:style-name="Source_20_Text">ScenarioSnapshot (historisable)</text:span></text:p>
      <text:p text:style-name="P56"><text:span text:style-name="Source_20_Text"><text:s text:c="8"/>↓</text:span></text:p>
      <text:p text:style-name="P56"><text:span text:style-name="Source_20_Text">ActionIntent (si VALIDATED)</text:span></text:p>
      <text:p text:style-name="P52"/>
      <text:h text:style-name="P69" text:outline-level="1">🧪 Pourquoi c’est sain</text:h>
      <text:p text:style-name="Text_20_body">✔️ découplé de l’exécution<text:line-break/>✔️ explicable<text:line-break/>✔️ backtestable<text:line-break/>✔️ multi-scénarios<text:line-break/>✔️ prêt pour ML plus tard<text:line-break/>✔️ compatible scheduler simple (tick global)</text:p>
      <text:p text:style-name="P52"/>
      <text:h text:style-name="P69" text:outline-level="1">🧠 Ton intuition est excellente</text:h>
      <text:p text:style-name="Text_20_body">Ce que tu construis :</text:p>
      <text:list text:style-name="L74">
        <text:list-item>
          <text:p text:style-name="P81">ressemble à de la <text:span text:style-name="Strong_20_Emphasis">sélection naturelle</text:span></text:p>
        </text:list-item>
        <text:list-item>
          <text:p text:style-name="P81">sans ML pour l’instant</text:p>
        </text:list-item>
        <text:list-item>
          <text:p text:style-name="P81"><text:soft-page-break/>mais <text:span text:style-name="Strong_20_Emphasis">ML-ready</text:span> plus tard (scoring, seuils, clustering)</text:p>
        </text:list-item>
      </text:list>
      <text:p text:style-name="Text_20_body">👉 Tu fais <text:span text:style-name="Strong_20_Emphasis">exactement ce qu’il faut</text:span> :<text:line-break/>architecture d’abord, intelligence ensuite.</text:p>
      <text:p text:style-name="P52"/>
      <text:h text:style-name="P53" text:outline-level="2">👉 Prochaine étape (au choix)</text:h>
      <text:list text:style-name="L75">
        <text:list-item>
          <text:p text:style-name="P82">Implémentation <text:span text:style-name="Strong_20_Emphasis">simple</text:span> de <text:span text:style-name="Source_20_Text">ScenarioEngine</text:span> (1ère version)</text:p>
        </text:list-item>
        <text:list-item>
          <text:p text:style-name="P82">Règles concrètes de transition <text:span text:style-name="Source_20_Text">ScenarioState</text:span></text:p>
        </text:list-item>
        <text:list-item>
          <text:p text:style-name="P82">Intégration avec <text:span text:style-name="Source_20_Text">ActionIntent</text:span></text:p>
        </text:list-item>
        <text:list-item>
          <text:p text:style-name="P82">Historisation DB des <text:span text:style-name="Source_20_Text">ScenarioSnapshot</text:span></text:p>
        </text:list-item>
      </text:list>
      <text:p text:style-name="Text_20_body">Dis-moi par quoi tu veux enchaîner 👌</text:p>
      <text:p text:style-name="Text_20_body"><text:span text:style-name="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4T17:11:05.668586800</meta:creation-date>
    <dc:date>2026-01-29T00:47:53.230755300</dc:date>
    <meta:editing-duration>P2DT21H9M50S</meta:editing-duration>
    <meta:editing-cycles>3</meta:editing-cycles>
    <meta:generator>LibreOffice/25.2.7.2$Windows_X86_64 LibreOffice_project/5cbfd1ab6520636bb5f7b99185aa69bd7456825d</meta:generator>
    <meta:document-statistic meta:table-count="1" meta:image-count="0" meta:object-count="0" meta:page-count="20" meta:paragraph-count="466" meta:word-count="2384" meta:character-count="14930" meta:non-whitespace-character-count="13031"/>
  </office:meta>
</office:document-meta>
</file>