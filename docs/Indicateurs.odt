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7000001F0E43138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0eb" officeooo:paragraph-rsid="0019c0eb"/>
    </style:style>
    <style:style style:name="P2" style:family="paragraph" style:parent-style-name="Standard">
      <style:text-properties officeooo:rsid="0019c0eb" officeooo:paragraph-rsid="001e5ca5"/>
    </style:style>
    <style:style style:name="P3" style:family="paragraph" style:parent-style-name="Standard">
      <style:text-properties officeooo:rsid="00215fb8" officeooo:paragraph-rsid="00215fb8"/>
    </style:style>
    <style:style style:name="P4" style:family="paragraph" style:parent-style-name="Standard">
      <style:text-properties officeooo:rsid="001babac" officeooo:paragraph-rsid="001babac"/>
    </style:style>
    <style:style style:name="P5" style:family="paragraph" style:parent-style-name="Standard">
      <style:text-properties officeooo:rsid="002496e0" officeooo:paragraph-rsid="002496e0"/>
    </style:style>
    <style:style style:name="T1" style:family="text">
      <style:text-properties officeooo:rsid="001bc78d"/>
    </style:style>
    <style:style style:name="T2" style:family="text">
      <style:text-properties officeooo:rsid="001dae49"/>
    </style:style>
    <style:style style:name="T3" style:family="text">
      <style:text-properties officeooo:rsid="001e5ca5"/>
    </style:style>
    <style:style style:name="T4" style:family="text">
      <style:text-properties officeooo:rsid="002014c0"/>
    </style:style>
    <style:style style:name="T5" style:family="text">
      <style:text-properties officeooo:rsid="0024ea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ateurs : <text:line-break/><text:line-break/>- Flow ETF monte ou descend / Positif ou négatif</text:p>
      <text:p text:style-name="P1">- FearAndGreed : Regarder l’évolution : Si monte d’un coup : pas bon, il risque de retomber.</text:p>
      <text:p text:style-name="P1">- Valeur du Dollar : DXY</text:p>
      <text:p text:style-name="P1">- S&amp;P500</text:p>
      <text:p text:style-name="P1">- Zones de rejets</text:p>
      <text:p text:style-name="P1">- Zone de Liquidités</text:p>
      <text:p text:style-name="P1">- Market Cap des Stables coins =&gt; Injection liquidités</text:p>
      <text:p text:style-name="P1">- <text:span text:style-name="T1">Date discours ou chiffres (emplois, FED, etc.)</text:span></text:p>
      <text:p text:style-name="P2">- <text:span text:style-name="T2">Open Interest<text:line-break/>- </text:span><text:span text:style-name="T3">Recup macro depuis canaux Telegram</text:span></text:p>
      <text:p text:style-name="P2">- <text:span text:style-name="T4">Flux de liquidité mondiale : GLI</text:span></text:p>
      <text:p text:style-name="P2">https://www.youtube.com/watch?v=qn2vK_lNsys</text:p>
      <text:p text:style-name="P3"><draw:frame draw:style-name="fr1" draw:name="Image1" text:anchor-type="char" svg:width="17cm" svg:height="9.019cm" draw:z-index="0"><draw:image xlink:href="Pictures/10000001000003A7000001F0E43138FA.png" xlink:type="simple" xlink:show="embed" xlink:actuate="onLoad" draw:mime-type="image/png"/></draw:frame>=&gt; global liquidity : qoq… mais je ne trouve pas dans tradingview;)</text:p>
      <text:p text:style-name="P1"/>
      <text:p text:style-name="P1"/>
      <text:p text:style-name="P4">Cryptolyze :</text:p>
      <text:p text:style-name="P4">- DXY</text:p>
      <text:p text:style-name="P4">- FearGreed</text:p>
      <text:p text:style-name="P4">- Liquidity</text:p>
      <text:p text:style-name="P4">- Market Volume</text:p>
      <text:p text:style-name="P4">- Nasdaq / SnP500</text:p>
      <text:p text:style-name="P4"/>
      <text:p text:style-name="P4"/>
      <text:p text:style-name="P5">Arriver à qualifier un mouvement : <text:line-break/>- est-ce de l’achat pur et dur <text:span text:style-name="T5">(market) </text:span>ou une cascade de long/short <text:span text:style-name="T5">(leviers)</text:span> ? (ShortSquizz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16:01:06.625089400</meta:creation-date>
    <dc:date>2026-07-07T19:09:12.761637600</dc:date>
    <meta:editing-duration>P1DT9H5M23S</meta:editing-duration>
    <meta:editing-cycles>9</meta:editing-cycles>
    <meta:generator>LibreOffice/25.2.7.2$Windows_X86_64 LibreOffice_project/5cbfd1ab6520636bb5f7b99185aa69bd7456825d</meta:generator>
    <meta:document-statistic meta:table-count="0" meta:image-count="1" meta:object-count="0" meta:page-count="1" meta:paragraph-count="19" meta:word-count="128" meta:character-count="724" meta:non-whitespace-character-count="612"/>
  </office:meta>
</office:document-meta>
</file>