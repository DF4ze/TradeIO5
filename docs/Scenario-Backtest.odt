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Voici les axes les plus cohérents, du plus structurant au plus tactique :</text:p>
      <text:list text:style-name="L1">
        <text:list-item>
          <text:p text:style-name="P1"><text:span text:style-name="Strong_20_Emphasis">Stabiliser le cœur “Decision / Scenario”</text:span></text:p>
          <text:list>
            <text:list-item>
              <text:p text:style-name="P1">Clarifier le rôle exact de <text:span text:style-name="Source_20_Text">MarketScenario</text:span> (scope, cycle de vie).</text:p>
            </text:list-item>
            <text:list-item>
              <text:p text:style-name="P1">Séparer proprement :</text:p>
              <text:list>
                <text:list-item>
                  <text:p text:style-name="P1">détection (signaux / indicateurs),</text:p>
                </text:list-item>
                <text:list-item>
                  <text:p text:style-name="P1">interprétation (scénarios),</text:p>
                </text:list-item>
                <text:list-item>
                  <text:p text:style-name="P1">action (ordres).<text:line-break/>👉 Base indispensable avant d’empiler de la complexité.</text:p>
                </text:list-item>
              </text:list>
            </text:list-item>
          </text:list>
        </text:list-item>
        <text:list-item>
          <text:p text:style-name="P1"><text:span text:style-name="Strong_20_Emphasis">Introduire une couche d’évaluation</text:span></text:p>
          <text:list>
            <text:list-item>
              <text:p text:style-name="P1">Associer chaque Decision / Scenario à :</text:p>
              <text:list>
                <text:list-item>
                  <text:p text:style-name="P1">PnL réalisé / latent,</text:p>
                </text:list-item>
                <text:list-item>
                  <text:p text:style-name="P1">durée de vie,</text:p>
                </text:list-item>
                <text:list-item>
                  <text:p text:style-name="P1">drawdown max,</text:p>
                </text:list-item>
                <text:list-item>
                  <text:p text:style-name="P1">contexte marché.<text:line-break/>👉 Pré-requis pour comparer stratégies et faire évoluer le bot intelligemment.</text:p>
                </text:list-item>
              </text:list>
            </text:list-item>
          </text:list>
        </text:list-item>
        <text:list-item>
          <text:p text:style-name="P1"><text:span text:style-name="Strong_20_Emphasis">Backtesting réaliste</text:span></text:p>
          <text:list>
            <text:list-item>
              <text:p text:style-name="P1">Rejouer le ScenarioEngine sur données historiques.</text:p>
            </text:list-item>
            <text:list-item>
              <text:p text:style-name="P1">Même code que le live (clock simulée).</text:p>
            </text:list-item>
            <text:list-item>
              <text:p text:style-name="P1">Comparer décisions “qui auraient dû être prises” vs “prises”.<text:line-break/>👉 Gros levier de confiance.</text:p>
            </text:list-item>
          </text:list>
        </text:list-item>
        <text:list-item>
          <text:p text:style-name="P1"><text:span text:style-name="Strong_20_Emphasis">Scoring &amp; priorisation</text:span></text:p>
          <text:list>
            <text:list-item>
              <text:p text:style-name="P1">Noter les scénarios (probabilité, qualité passée).</text:p>
            </text:list-item>
            <text:list-item>
              <text:p text:style-name="P1">Arbitrer quand plusieurs stratégies veulent agir en même temps.<text:line-break/>👉 Évite les conflits Grid / DCA / Crash Recovery.</text:p>
            </text:list-item>
          </text:list>
        </text:list-item>
        <text:list-item>
          <text:p text:style-name="P1"><text:span text:style-name="Strong_20_Emphasis">Ouverture API / multi-utilisateur</text:span></text:p>
          <text:list>
            <text:list-item>
              <text:p text:style-name="P1">Préparer le terrain sans tout activer :</text:p>
              <text:list>
                <text:list-item>
                  <text:p text:style-name="P1">séparation core / execution,</text:p>
                </text:list-item>
                <text:list-item>
                  <text:p text:style-name="P1">comptes isolés,</text:p>
                </text:list-item>
                <text:list-item>
                  <text:p text:style-name="P1">métriques par user.<text:line-break/>👉 Vision long terme, mais certaines décisions d’archi se prennent tôt.</text:p>
                </text:list-item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3T23:36:32.363563300</meta:creation-date>
    <dc:date>2026-02-03T23:37:08.953504800</dc:date>
    <meta:editing-duration>PT37S</meta:editing-duration>
    <meta:editing-cycles>1</meta:editing-cycles>
    <meta:document-statistic meta:table-count="0" meta:image-count="0" meta:object-count="0" meta:page-count="1" meta:paragraph-count="25" meta:word-count="193" meta:character-count="1159" meta:non-whitespace-character-count="1015"/>
    <meta:generator>LibreOffice/25.2.7.2$Windows_X86_64 LibreOffice_project/5cbfd1ab6520636bb5f7b99185aa69bd7456825d</meta:generator>
  </office:meta>
</office:document-meta>
</file>