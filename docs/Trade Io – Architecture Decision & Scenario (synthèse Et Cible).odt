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>
      <loext:graphic-properties draw:fill="solid" draw:fill-color="#ffffff"/>
      <style:paragraph-properties fo:text-align="center"/>
    </style:style>
    <style:style style:name="P2" style:family="paragraph" style:parent-style-name="Compact" style:list-style-name="WWNum1001"/>
    <style:style style:name="P3" style:family="paragraph" style:parent-style-name="Compact" style:list-style-name="WWNum1002"/>
    <style:style style:name="P4" style:family="paragraph" style:parent-style-name="Compact" style:list-style-name="WWNum1003"/>
    <style:style style:name="P5" style:family="paragraph" style:parent-style-name="Compact" style:list-style-name="WWNum1004">
      <style:text-properties fo:font-weight="bold" style:font-weight-asian="bold" style:font-weight-complex="bold"/>
    </style:style>
    <style:style style:name="P6" style:family="paragraph" style:parent-style-name="Compact" style:list-style-name="WWNum1005"/>
    <style:style style:name="P7" style:family="paragraph" style:parent-style-name="Compact" style:list-style-name="WWNum1004"/>
    <style:style style:name="P8" style:family="paragraph" style:parent-style-name="Compact" style:list-style-name="WWNum1006"/>
    <style:style style:name="P9" style:family="paragraph" style:parent-style-name="Compact" style:list-style-name="WWNum1007"/>
    <style:style style:name="P10" style:family="paragraph" style:parent-style-name="Block_20_Text">
      <style:text-properties fo:font-weight="bold" style:font-weight-asian="bold" style:font-weight-complex="bold"/>
    </style:style>
    <style:style style:name="P11" style:family="paragraph" style:parent-style-name="Compact" style:list-style-name="WWNum1008">
      <style:text-properties fo:font-weight="bold" style:font-weight-asian="bold" style:font-weight-complex="bold"/>
    </style:style>
    <style:style style:name="P12" style:family="paragraph" style:parent-style-name="Compact" style:list-style-name="WWNum1008"/>
    <style:style style:name="P13" style:family="paragraph" style:parent-style-name="Compact" style:list-style-name="WWNum1009"/>
    <style:style style:name="P14" style:family="paragraph" style:parent-style-name="Compact" style:list-style-name="WWNum1010"/>
    <style:style style:name="P15" style:family="paragraph" style:parent-style-name="Compact" style:list-style-name="WWNum1011"/>
    <style:style style:name="P16" style:family="paragraph" style:parent-style-name="Compact" style:list-style-name="WWNum1012"/>
    <style:style style:name="P17" style:family="paragraph" style:parent-style-name="Compact" style:list-style-name="WWNum1013"/>
    <style:style style:name="P18" style:family="paragraph" style:parent-style-name="Compact" style:list-style-name="WWNum1014"/>
    <style:style style:name="P19" style:family="paragraph" style:parent-style-name="Compact" style:list-style-name="WWNum1015"/>
    <style:style style:name="P20" style:family="paragraph" style:parent-style-name="Compact" style:list-style-name="WWNum1016"/>
    <style:style style:name="P21" style:family="paragraph" style:parent-style-name="Compact" style:list-style-name="WWNum1017"/>
    <style:style style:name="P22" style:family="paragraph" style:parent-style-name="Compact" style:list-style-name="WWNum1018"/>
    <style:style style:name="P23" style:family="paragraph" style:parent-style-name="Horizontal_20_Line">
      <style:paragraph-properties fo:margin-top="0.318cm" fo:margin-bottom="0.318cm" style:contextual-spacing="false"/>
    </style:style>
    <style:style style:name="P24" style:family="paragraph" style:parent-style-name="Heading_20_2">
      <style:paragraph-properties fo:margin-top="0.318cm" fo:margin-bottom="0.318cm" style:contextual-spacing="false"/>
    </style:style>
    <style:style style:name="P25" style:family="paragraph" style:parent-style-name="Text_20_body" style:list-style-name="L1"/>
    <style:style style:name="P26" style:family="paragraph" style:parent-style-name="Heading_20_3">
      <style:paragraph-properties fo:margin-top="0.318cm" fo:margin-bottom="0.318cm" style:contextual-spacing="false"/>
    </style:style>
    <style:style style:name="P27" style:family="paragraph" style:parent-style-name="Preformatted_20_Text">
      <style:paragraph-properties fo:margin-top="0.318cm" fo:margin-bottom="0.318cm" style:contextual-spacing="false"/>
    </style:style>
    <style:style style:name="P28" style:family="paragraph" style:parent-style-name="Heading_20_4">
      <style:paragraph-properties fo:margin-top="0.318cm" fo:margin-bottom="0.318cm" style:contextual-spacing="false"/>
    </style:style>
    <style:style style:name="P29" style:family="paragraph" style:parent-style-name="Text_20_body" style:list-style-name="L2"/>
    <style:style style:name="P30" style:family="paragraph" style:parent-style-name="Text_20_body" style:list-style-name="L3"/>
    <style:style style:name="P31" style:family="paragraph" style:parent-style-name="Text_20_body" style:list-style-name="L4"/>
    <style:style style:name="P32" style:family="paragraph" style:parent-style-name="Text_20_body" style:list-style-name="L5"/>
    <style:style style:name="P33" style:family="paragraph" style:parent-style-name="Text_20_body" style:list-style-name="L6"/>
    <style:style style:name="P34" style:family="paragraph" style:parent-style-name="Text_20_body" style:list-style-name="L7"/>
    <style:style style:name="P35" style:family="paragraph" style:parent-style-name="Text_20_body" style:list-style-name="L8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6168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X757c3a36ad235027057782f9833aa51404bfedd"/>TradeIO – Synthèse de réflexion et architecture cible</text:h>
      <text:h text:style-name="Heading_20_2" text:outline-level="2"><text:bookmark-start text:name="objectif-général"/>1. Objectif général</text:h>
      <text:p text:style-name="First_20_Paragraph">TradeIO vise à être un <text:span text:style-name="T1">moteur de décisions de trading intelligent</text:span>, capable de : - interpréter le marché via des scénarios, - transformer certaines hypothèses en <text:span text:style-name="T1">décisions traçables</text:span>, - exécuter ces décisions dans des environnements variés (exchange, non-custodial), - mesurer la qualité des décisions (PnL, durée, risque), - fonctionner <text:span text:style-name="T1">à l’identique en live et en backtest</text:span>.</text:p>
      <text:p text:style-name="Text_20_body">Le cœur du système n’est pas l’ordre, mais <text:span text:style-name="T1">la décision</text:span>.</text:p>
      <text:p text:style-name="Standard"><draw:rect text:anchor-type="as-char" style:rel-width="100%" draw:z-index="0" draw:name="Forme1" draw:style-name="gr1" draw:text-style-name="P1" svg:width="16.511cm" svg:height="0.054cm"><text:p/></draw:rect><text:bookmark-end text:name="objectif-général"/></text:p>
      <text:h text:style-name="Heading_20_2" text:outline-level="2"><text:bookmark-start text:name="état-actuel-point-de-départ"/>2. État actuel (point de départ)</text:h>
      <text:h text:style-name="Heading_20_3" text:outline-level="3"><text:bookmark-start text:name="ce-qui-est-déjà-en-place"/>Ce qui est déjà en place</text:h>
      <text:list xml:id="list2694274346" text:style-name="WWNum1001">
        <text:list-item>
          <text:p text:style-name="P2"><text:span text:style-name="Verbatim_20_Char">ScenarioEngine</text:span> centralisant :</text:p>
          <text:list text:style-name="WWNum1002">
            <text:list-item>
              <text:p text:style-name="P3">observation du marché,</text:p>
            </text:list-item>
            <text:list-item>
              <text:p text:style-name="P3">création, mutation et fusion de <text:span text:style-name="Verbatim_20_Char">MarketScenario</text:span>,</text:p>
            </text:list-item>
            <text:list-item>
              <text:p text:style-name="P3">gestion du cycle de vie (INITIAL → EMERGING → CONFIRMING → VALIDATED / INVALIDATED / EXPIRED),</text:p>
            </text:list-item>
            <text:list-item>
              <text:p text:style-name="P3">historisation des changements d’état.</text:p>
            </text:list-item>
          </text:list>
        </text:list-item>
        <text:list-item>
          <text:p text:style-name="P2"><text:span text:style-name="Verbatim_20_Char">MarketScenarioImpl</text:span> joue déjà très bien son rôle de :</text:p>
          <text:list text:style-name="WWNum1003">
            <text:list-item>
              <text:p text:style-name="P4"><text:span text:style-name="T1">formulation d’hypothèses marché</text:span>,</text:p>
            </text:list-item>
            <text:list-item>
              <text:p text:style-name="P4">montée / descente progressive en confiance,</text:p>
            </text:list-item>
            <text:list-item>
              <text:p text:style-name="P4">proposition d’une intention d’action lorsque le scénario est VALIDATED et stable.<text:bookmark-end text:name="ce-qui-est-déjà-en-place"/></text:p>
            </text:list-item>
          </text:list>
        </text:list-item>
      </text:list>
      <text:h text:style-name="Heading_20_3" text:outline-level="3"><text:bookmark-start text:name="limite-identifiée"/>Limite identifiée</text:h>
      <text:p text:style-name="First_20_Paragraph">Le scénario : - interprète le marché, - décide qu’une action est pertinente, - <text:span text:style-name="T1">mais ne doit pas être responsable de l’exécution ni du suivi de performance</text:span>.</text:p>
      <text:p text:style-name="Text_20_body">Il manque une couche explicite entre <text:span text:style-name="T2">hypothèse</text:span> et <text:span text:style-name="T2">engagement</text:span>.</text:p>
      <text:p text:style-name="Standard"><draw:rect text:anchor-type="as-char" style:rel-width="100%" draw:z-index="1" draw:name="Forme2" draw:style-name="gr1" draw:text-style-name="P1" svg:width="16.511cm" svg:height="0.054cm"><text:p/></draw:rect><text:bookmark-end text:name="limite-identifiée"/><text:bookmark-end text:name="état-actuel-point-de-départ"/></text:p>
      <text:h text:style-name="Heading_20_2" text:outline-level="2"><text:bookmark-start text:name="décision-clé-prise"/>3. Décision clé prise</text:h>
      <text:h text:style-name="Heading_20_3" text:outline-level="3"><text:bookmark-start text:name="séparation-stricte-des-responsabilités"/>Séparation stricte des responsabilités</text:h>
      <text:list xml:id="list22005664968864" text:continue-list="list2694274346" text:style-name="WWNum1004">
        <text:list-item>
          <text:p text:style-name="P5">MarketScenario</text:p>
          <text:list text:style-name="WWNum1005">
            <text:list-item>
              <text:p text:style-name="P6">= hypothèse marché vivante</text:p>
            </text:list-item>
            <text:list-item>
              <text:p text:style-name="P6">peut évoluer, se renforcer, s’invalider</text:p>
            </text:list-item>
            <text:list-item>
              <text:p text:style-name="P6">ne sait rien du trade réel</text:p>
            </text:list-item>
          </text:list>
        </text:list-item>
        <text:list-item>
          <text:p text:style-name="P7"><text:soft-page-break/><text:span text:style-name="T1">Decision</text:span></text:p>
          <text:list text:style-name="WWNum1006">
            <text:list-item>
              <text:p text:style-name="P8">= engagement stratégique pris à un instant donné</text:p>
            </text:list-item>
            <text:list-item>
              <text:p text:style-name="P8">créé à partir d’un scénario VALIDATED</text:p>
            </text:list-item>
            <text:list-item>
              <text:p text:style-name="P8">traçable, mesurable, finie</text:p>
            </text:list-item>
          </text:list>
        </text:list-item>
      </text:list>
      <text:p text:style-name="Standard"><draw:rect text:anchor-type="as-char" style:rel-width="100%" draw:z-index="2" draw:name="Forme3" draw:style-name="gr1" draw:text-style-name="P1" svg:width="16.511cm" svg:height="0.054cm"><text:p/></draw:rect><text:bookmark-end text:name="séparation-stricte-des-responsabilités"/><text:bookmark-end text:name="décision-clé-prise"/></text:p>
      <text:h text:style-name="Heading_20_2" text:outline-level="2"><text:bookmark-start text:name="choix-du-modèle-de-décision"/>4. Choix du modèle de décision</text:h>
      <text:h text:style-name="Heading_20_3" text:outline-level="3"><text:bookmark-start text:name="décision-composite-dès-la-v1"/>Décision composite dès la V1</text:h>
      <text:list xml:id="list22005424838675" text:continue-list="list22005664968864" text:style-name="WWNum1007">
        <text:list-item>
          <text:p text:style-name="P9">Une décision représente une <text:span text:style-name="T1">intention longue</text:span> (ex : DCA intelligent).</text:p>
        </text:list-item>
        <text:list-item>
          <text:p text:style-name="P9">Elle est composée de plusieurs <text:span text:style-name="T1">ActionSteps</text:span> (BUY, SELL, EXIT…).</text:p>
        </text:list-item>
        <text:list-item>
          <text:p text:style-name="P9">Chaque step est lié à des conditions explicites.<text:bookmark-end text:name="décision-composite-dès-la-v1"/></text:p>
        </text:list-item>
      </text:list>
      <text:h text:style-name="Heading_20_3" text:outline-level="3"><text:bookmark-start text:name="Xa8ee853285e80fe65efb32caa7e72cfb81b65bf"/>Discipline V1 : « composite au goût d’atomique »</text:h>
      <text:p text:style-name="First_20_Paragraph">Pour limiter la complexité initiale : - le plan d’actions est défini dès la création de la décision, - un seul step est actif à la fois, - pas de branching dynamique implicite, - les règles d’évolution sont explicites et historisables.</text:p>
      <text:p text:style-name="Text_20_body">Cela permet : - des backtests simples, - un PnL clair par décision, - une montée en complexité progressive sans refonte.</text:p>
      <text:p text:style-name="Standard"><draw:rect text:anchor-type="as-char" style:rel-width="100%" draw:z-index="3" draw:name="Forme4" draw:style-name="gr1" draw:text-style-name="P1" svg:width="16.511cm" svg:height="0.054cm"><text:p/></draw:rect><text:bookmark-end text:name="Xa8ee853285e80fe65efb32caa7e72cfb81b65bf"/><text:bookmark-end text:name="choix-du-modèle-de-décision"/></text:p>
      <text:h text:style-name="Heading_20_2" text:outline-level="2"><text:bookmark-start text:name="environnement-dexécution"/>5. Environnement d’exécution</text:h>
      <text:h text:style-name="Heading_20_3" text:outline-level="3"><text:bookmark-start text:name="principe"/>Principe</text:h>
      <text:p text:style-name="First_20_Paragraph">La décision <text:span text:style-name="T1">ne dépend pas d’un exchange concret</text:span>, mais : - elle connaît un <text:span text:style-name="T1">ExecutionEnvironment</text:span> abstrait.<text:bookmark-end text:name="principe"/></text:p>
      <text:h text:style-name="Heading_20_3" text:outline-level="3"><text:bookmark-start text:name="rôle-de-lenvironnement"/>Rôle de l’environnement</text:h>
      <text:p text:style-name="First_20_Paragraph">Il fournit : - frais (maker / taker / réseau), - slippage estimé, - contraintes (taille minimale, latence), - type d’environnement (exchange vs non-custodial).</text:p>
      <text:p text:style-name="Text_20_body">➡️ L’environnement <text:span text:style-name="T1">influence la décision</text:span> (fréquence, granularité), sans la coupler à une implémentation technique.</text:p>
      <text:p text:style-name="Standard"><draw:rect text:anchor-type="as-char" style:rel-width="100%" draw:z-index="4" draw:name="Forme5" draw:style-name="gr1" draw:text-style-name="P1" svg:width="16.511cm" svg:height="0.054cm"><text:p/></draw:rect><text:bookmark-end text:name="rôle-de-lenvironnement"/><text:bookmark-end text:name="environnement-dexécution"/></text:p>
      <text:h text:style-name="Heading_20_2" text:outline-level="2"><text:bookmark-start text:name="live-et-backtest"/>6. Live et Backtest</text:h>
      <text:p text:style-name="First_20_Paragraph">Décision forte prise :</text:p>
      <text:p text:style-name="P10">Le même code doit tourner en live et en backtest.</text:p>
      <text:p text:style-name="First_20_Paragraph">Seuls changent : - la <text:span text:style-name="Verbatim_20_Char">Clock</text:span>, - la source de données marché, - l’adaptateur d’exécution.</text:p>
      <text:p text:style-name="Text_20_body"><text:soft-page-break/>Les règles de décision, d’arbitrage et de suivi sont strictement identiques.</text:p>
      <text:p text:style-name="Standard"><draw:rect text:anchor-type="as-char" style:rel-width="100%" draw:z-index="5" draw:name="Forme6" draw:style-name="gr1" draw:text-style-name="P1" svg:width="16.511cm" svg:height="0.054cm"><text:p/></draw:rect><text:bookmark-end text:name="live-et-backtest"/></text:p>
      <text:h text:style-name="Heading_20_2" text:outline-level="2"><text:bookmark-start text:name="suivi-et-métriques-v1"/>7. Suivi et métriques (V1)</text:h>
      <text:h text:style-name="Heading_20_3" text:outline-level="3"><text:bookmark-start text:name="métriques-retenues-pour-la-v1"/>Métriques retenues pour la V1</text:h>
      <text:list xml:id="list22005612577488" text:continue-list="list22005424838675" text:style-name="WWNum1008">
        <text:list-item>
          <text:p text:style-name="P11">PnL final par décision</text:p>
        </text:list-item>
        <text:list-item>
          <text:p text:style-name="P12"><text:span text:style-name="T1">Durée de vie</text:span> (EXECUTED → CLOSED)<text:bookmark-end text:name="métriques-retenues-pour-la-v1"/></text:p>
        </text:list-item>
      </text:list>
      <text:h text:style-name="Heading_20_3" text:outline-level="3"><text:bookmark-start text:name="anticipation-des-extensions"/>Anticipation des extensions</text:h>
      <text:p text:style-name="First_20_Paragraph">L’architecture doit permettre d’ajouter plus tard : - excursions de prix, - MFE / MAE, - drawdown intra-décision, - métriques de risque.</text:p>
      <text:p text:style-name="Standard"><draw:rect text:anchor-type="as-char" style:rel-width="100%" draw:z-index="6" draw:name="Forme7" draw:style-name="gr1" draw:text-style-name="P1" svg:width="16.511cm" svg:height="0.054cm"><text:p/></draw:rect><text:bookmark-end text:name="anticipation-des-extensions"/><text:bookmark-end text:name="suivi-et-métriques-v1"/></text:p>
      <text:h text:style-name="Heading_20_2" text:outline-level="2"><text:bookmark-start text:name="ownership"/>8. Ownership</text:h>
      <text:list xml:id="list22004246644349" text:continue-list="list22005612577488" text:style-name="WWNum1009">
        <text:list-item>
          <text:p text:style-name="P13">Les décisions restent liées à un <text:span text:style-name="Verbatim_20_Char">ScenarioOwner</text:span>.</text:p>
        </text:list-item>
        <text:list-item>
          <text:p text:style-name="P13">Ce concept pourra évoluer (renommage futur),</text:p>
        </text:list-item>
        <text:list-item>
          <text:p text:style-name="P13">mais il est suffisant et cohérent pour la V1.</text:p>
        </text:list-item>
      </text:list>
      <text:p text:style-name="Standard"><draw:rect text:anchor-type="as-char" style:rel-width="100%" draw:z-index="7" draw:name="Forme8" draw:style-name="gr1" draw:text-style-name="P1" svg:width="16.511cm" svg:height="0.054cm"><text:p/></draw:rect><text:bookmark-end text:name="ownership"/></text:p>
      <text:h text:style-name="Heading_20_2" text:outline-level="2"><text:bookmark-start text:name="architecture-cible-vue-conceptuelle"/>9. Architecture cible (vue conceptuelle)</text:h>
      <text:p text:style-name="Source_20_Code"><text:span text:style-name="Verbatim_20_Char">Market Data</text:span><text:line-break/><text:span text:style-name="Verbatim_20_Char"> <text:s text:c="3"/>↓</text:span><text:line-break/><text:span text:style-name="Verbatim_20_Char">MarketOpinion</text:span><text:line-break/><text:span text:style-name="Verbatim_20_Char"> <text:s text:c="3"/>↓</text:span><text:line-break/><text:span text:style-name="Verbatim_20_Char">ScenarioEngine</text:span><text:line-break/><text:span text:style-name="Verbatim_20_Char"> <text:s text:c="3"/>↓</text:span><text:line-break/><text:span text:style-name="Verbatim_20_Char">MarketScenario (hypothèses)</text:span><text:line-break/><text:span text:style-name="Verbatim_20_Char"> <text:s text:c="3"/>↓ <text:s/>(VALIDATED)</text:span><text:line-break/><text:span text:style-name="Verbatim_20_Char">DecisionCandidate</text:span><text:line-break/><text:span text:style-name="Verbatim_20_Char"> <text:s text:c="3"/>↓</text:span><text:line-break/><text:span text:style-name="Verbatim_20_Char">DecisionEngine</text:span><text:line-break/><text:span text:style-name="Verbatim_20_Char"> <text:s text:c="3"/>↓</text:span><text:line-break/><text:span text:style-name="Verbatim_20_Char">Decision (composite)</text:span><text:line-break/><text:span text:style-name="Verbatim_20_Char"> <text:s text:c="3"/>├─ ActionStep 1 (EXECUTED)</text:span><text:line-break/><text:span text:style-name="Verbatim_20_Char"> <text:s text:c="3"/>├─ ActionStep 2 (PENDING)</text:span><text:line-break/><text:span text:style-name="Verbatim_20_Char"> <text:s text:c="3"/>└─ ...</text:span><text:line-break/><text:span text:style-name="Verbatim_20_Char"> <text:s text:c="3"/>↓</text:span><text:line-break/><text:span text:style-name="Verbatim_20_Char">DecisionMonitor</text:span><text:line-break/><text:span text:style-name="Verbatim_20_Char"> <text:s text:c="3"/>↓</text:span><text:line-break/><text:span text:style-name="Verbatim_20_Char">Decision CLOSED (PnL, durée)</text:span></text:p>
      <text:p text:style-name="Standard"><draw:rect text:anchor-type="as-char" style:rel-width="100%" draw:z-index="8" draw:name="Forme9" draw:style-name="gr1" draw:text-style-name="P1" svg:width="16.511cm" svg:height="0.054cm"><text:p/></draw:rect><text:bookmark-end text:name="architecture-cible-vue-conceptuelle"/></text:p>
      <text:h text:style-name="Heading_20_2" text:outline-level="2"><text:bookmark-start text:name="rôles-des-principaux-objets"/><text:soft-page-break/>10. Rôles des principaux objets</text:h>
      <text:h text:style-name="Heading_20_3" text:outline-level="3"><text:bookmark-start text:name="scenarioengine"/>ScenarioEngine</text:h>
      <text:list xml:id="list22004278967620" text:continue-list="list22004246644349" text:style-name="WWNum1010">
        <text:list-item>
          <text:p text:style-name="P14">Observe le marché</text:p>
        </text:list-item>
        <text:list-item>
          <text:p text:style-name="P14">Crée / met à jour / expire les scénarios</text:p>
        </text:list-item>
        <text:list-item>
          <text:p text:style-name="P14">Ne connaît pas l’exécution<text:bookmark-end text:name="scenarioengine"/></text:p>
        </text:list-item>
      </text:list>
      <text:h text:style-name="Heading_20_3" text:outline-level="3"><text:bookmark-start text:name="marketscenario"/>MarketScenario</text:h>
      <text:list xml:id="list22004981729307" text:continue-list="list22004278967620" text:style-name="WWNum1011">
        <text:list-item>
          <text:p text:style-name="P15">Porte une hypothèse marché</text:p>
        </text:list-item>
        <text:list-item>
          <text:p text:style-name="P15">Gère confiance, signal, stabilité</text:p>
        </text:list-item>
        <text:list-item>
          <text:p text:style-name="P15">Peut proposer un <text:span text:style-name="T1">DecisionCandidate</text:span><text:bookmark-end text:name="marketscenario"/></text:p>
        </text:list-item>
      </text:list>
      <text:h text:style-name="Heading_20_3" text:outline-level="3"><text:bookmark-start text:name="decisioncandidate"/>DecisionCandidate</text:h>
      <text:list xml:id="list22005946441307" text:continue-list="list22004981729307" text:style-name="WWNum1012">
        <text:list-item>
          <text:p text:style-name="P16">Objet léger</text:p>
        </text:list-item>
        <text:list-item>
          <text:p text:style-name="P16">Signale qu’un scénario est mûr pour engagement</text:p>
        </text:list-item>
        <text:list-item>
          <text:p text:style-name="P16">Ne déclenche rien seul<text:bookmark-end text:name="decisioncandidate"/></text:p>
        </text:list-item>
      </text:list>
      <text:h text:style-name="Heading_20_3" text:outline-level="3"><text:bookmark-start text:name="decisionengine"/>DecisionEngine</text:h>
      <text:list xml:id="list22004148176260" text:continue-list="list22005946441307" text:style-name="WWNum1013">
        <text:list-item>
          <text:p text:style-name="P17">Centralise les décisions</text:p>
        </text:list-item>
        <text:list-item>
          <text:p text:style-name="P17">Déduplique (1 scénario → 1 décision)</text:p>
        </text:list-item>
        <text:list-item>
          <text:p text:style-name="P17">Arbitre entre décisions concurrentes</text:p>
        </text:list-item>
        <text:list-item>
          <text:p text:style-name="P17">Crée les <text:span text:style-name="Verbatim_20_Char">Decision</text:span><text:bookmark-end text:name="decisionengine"/></text:p>
        </text:list-item>
      </text:list>
      <text:h text:style-name="Heading_20_3" text:outline-level="3"><text:bookmark-start text:name="decision"/>Decision</text:h>
      <text:list xml:id="list22004180577555" text:continue-list="list22004148176260" text:style-name="WWNum1014">
        <text:list-item>
          <text:p text:style-name="P18">Représente un engagement stratégique</text:p>
        </text:list-item>
        <text:list-item>
          <text:p text:style-name="P18">Contient un plan d’ActionSteps</text:p>
        </text:list-item>
        <text:list-item>
          <text:p text:style-name="P18">Gère son propre lifecycle (CREATED → EXECUTED → MONITORING → CLOSED)<text:bookmark-end text:name="decision"/></text:p>
        </text:list-item>
      </text:list>
      <text:h text:style-name="Heading_20_3" text:outline-level="3"><text:bookmark-start text:name="actionstep"/>ActionStep</text:h>
      <text:list xml:id="list22005259308705" text:continue-list="list22004180577555" text:style-name="WWNum1015">
        <text:list-item>
          <text:p text:style-name="P19">Action élémentaire (BUY, SELL, EXIT…)</text:p>
        </text:list-item>
        <text:list-item>
          <text:p text:style-name="P19">Conditions explicites</text:p>
        </text:list-item>
        <text:list-item>
          <text:p text:style-name="P19">Résultat mesurable<text:bookmark-end text:name="actionstep"/></text:p>
        </text:list-item>
      </text:list>
      <text:h text:style-name="Heading_20_3" text:outline-level="3"><text:bookmark-start text:name="executionenvironment"/>ExecutionEnvironment</text:h>
      <text:list xml:id="list22005149253369" text:continue-list="list22005259308705" text:style-name="WWNum1016">
        <text:list-item>
          <text:p text:style-name="P20">Modélise les coûts et contraintes</text:p>
        </text:list-item>
        <text:list-item>
          <text:p text:style-name="P20">Influence la décision sans la lier à un exchange<text:bookmark-end text:name="executionenvironment"/></text:p>
        </text:list-item>
      </text:list>
      <text:h text:style-name="Heading_20_3" text:outline-level="3"><text:bookmark-start text:name="decisionmonitor"/>DecisionMonitor</text:h>
      <text:list xml:id="list22005059065707" text:continue-list="list22005149253369" text:style-name="WWNum1017">
        <text:list-item>
          <text:p text:style-name="P21">Suit l’évolution post-exécution</text:p>
        </text:list-item>
        <text:list-item>
          <text:p text:style-name="P21">Calcule PnL et durée</text:p>
        </text:list-item>
        <text:list-item>
          <text:p text:style-name="P21">Prépare les métriques futures</text:p>
        </text:list-item>
      </text:list>
      <text:p text:style-name="Standard"><draw:rect text:anchor-type="as-char" style:rel-width="100%" draw:z-index="9" draw:name="Forme10" draw:style-name="gr1" draw:text-style-name="P1" svg:width="16.511cm" svg:height="0.054cm"><text:p/></draw:rect><text:bookmark-end text:name="decisionmonitor"/><text:bookmark-end text:name="rôles-des-principaux-objets"/></text:p>
      <text:h text:style-name="Heading_20_2" text:outline-level="2"><text:bookmark-start text:name="prochaine-étape-naturelle"/><text:soft-page-break/>11. Prochaine étape naturelle</text:h>
      <text:list text:continue-list="list22005059065707" text:style-name="WWNum1018">
        <text:list-item>
          <text:p text:style-name="P22">Valider définitivement cette architecture</text:p>
        </text:list-item>
        <text:list-item>
          <text:p text:style-name="P22">Puis définir <text:span text:style-name="T1">les interfaces Java</text:span> correspondantes</text:p>
        </text:list-item>
        <text:list-item>
          <text:p text:style-name="P22">Sans encore coder la logique métier</text:p>
        </text:list-item>
      </text:list>
      <text:p text:style-name="First_20_Paragraph">L’objectif est une base conceptuelle solide, traçable et évolutive.<text:bookmark-end text:name="prochaine-étape-naturelle"/><text:bookmark-end text:name="X757c3a36ad235027057782f9833aa51404bfedd"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=== Rapport d'Architecture TradeIO (version enrichie) ===</text:p>
      <text:p text:style-name="P23"/>
      <text:h text:style-name="P24" text:outline-level="2">1. Synthèse générale</text:h>
      <text:p text:style-name="Text_20_body">TradeIO est un bot de trading orienté DCA intelligent et décisions basées sur la combinaison de scénarios locaux et globaux. Le système est conçu pour :</text:p>
      <text:list text:style-name="L1">
        <text:list-item>
          <text:p text:style-name="P25">Collecter et traiter les données de marché.</text:p>
        </text:list-item>
        <text:list-item>
          <text:p text:style-name="P25">Maintenir un état des scénarios (local et global).</text:p>
        </text:list-item>
        <text:list-item>
          <text:p text:style-name="P25">Générer des décisions de trading traçables.</text:p>
        </text:list-item>
        <text:list-item>
          <text:p text:style-name="P25">Évaluer la performance des décisions de manière cohérente (live et backtest).</text:p>
        </text:list-item>
      </text:list>
      <text:p text:style-name="Text_20_body">L'objectif principal est de créer un <text:span text:style-name="Strong_20_Emphasis">pipeline complet et traçable</text:span> : indicateurs → scénarios → décision → action → suivi / évaluation.</text:p>
      <text:p text:style-name="P23"/>
      <text:h text:style-name="P24" text:outline-level="2">2. Architecture conceptuelle <text:span text:style-name="T3">de la partie “tree” arbre de décisions</text:span></text:h>
      <text:h text:style-name="P26" text:outline-level="3">2.1. Flux général</text:h>
      <text:p text:style-name="P27"><text:span text:style-name="Source_20_Text">Market Data</text:span></text:p>
      <text:p text:style-name="P27"><text:span text:style-name="Source_20_Text"><text:s text:c="4"/>│</text:span></text:p>
      <text:p text:style-name="P27"><text:soft-page-break/><text:span text:style-name="Source_20_Text"><text:s text:c="4"/>▼</text:span></text:p>
      <text:p text:style-name="P27"><text:span text:style-name="Source_20_Text">Market Opinion Result</text:span></text:p>
      <text:p text:style-name="P27"><text:span text:style-name="Source_20_Text"><text:s text:c="4"/>│</text:span></text:p>
      <text:p text:style-name="P27"><text:span text:style-name="Source_20_Text"><text:s text:c="4"/>▼</text:span></text:p>
      <text:p text:style-name="P27"><text:span text:style-name="Source_20_Text">ScenarioEngine</text:span></text:p>
      <text:p text:style-name="P27"><text:span text:style-name="Source_20_Text"><text:s text:c="4"/>│</text:span></text:p>
      <text:p text:style-name="P27"><text:span text:style-name="Source_20_Text"><text:s text:c="4"/>├─ Local MarketScenario(s) (symbol spécifique)</text:span></text:p>
      <text:p text:style-name="P27"><text:span text:style-name="Source_20_Text"><text:s text:c="4"/>└─ Global MarketScenario(s) (macro / global)</text:span></text:p>
      <text:p text:style-name="P27"><text:span text:style-name="Source_20_Text"><text:s text:c="4"/>│</text:span></text:p>
      <text:p text:style-name="P27"><text:span text:style-name="Source_20_Text"><text:s text:c="4"/>▼</text:span></text:p>
      <text:p text:style-name="P27"><text:span text:style-name="Source_20_Text">DecisionCandidate(s)</text:span></text:p>
      <text:p text:style-name="P27"><text:span text:style-name="Source_20_Text"><text:s text:c="4"/>│</text:span></text:p>
      <text:p text:style-name="P27"><text:span text:style-name="Source_20_Text"><text:s text:c="4"/>▼</text:span></text:p>
      <text:p text:style-name="P27"><text:span text:style-name="Source_20_Text">DecisionEngine</text:span></text:p>
      <text:p text:style-name="P27"><text:span text:style-name="Source_20_Text"><text:s text:c="4"/>│</text:span></text:p>
      <text:p text:style-name="P27"><text:span text:style-name="Source_20_Text"><text:s text:c="4"/>▼</text:span></text:p>
      <text:p text:style-name="P27"><text:span text:style-name="Source_20_Text">Decision (composite)</text:span></text:p>
      <text:p text:style-name="P27"><text:span text:style-name="Source_20_Text"><text:s text:c="4"/>│</text:span></text:p>
      <text:p text:style-name="P27"><text:span text:style-name="Source_20_Text"><text:s text:c="4"/>▼</text:span></text:p>
      <text:p text:style-name="P27"><text:span text:style-name="Source_20_Text">ActionStep(s)</text:span></text:p>
      <text:p text:style-name="P27"><text:span text:style-name="Source_20_Text"><text:s text:c="4"/>│</text:span></text:p>
      <text:p text:style-name="P27"><text:span text:style-name="Source_20_Text"><text:s text:c="4"/>▼</text:span></text:p>
      <text:p text:style-name="P27"><text:span text:style-name="Source_20_Text">DecisionMonitor / DecisionEvaluation</text:span></text:p>
      <text:h text:style-name="P26" text:outline-level="3">2.2. Rôle des principaux composants</text:h>
      <text:h text:style-name="P28" text:outline-level="4">a) MarketScenario</text:h>
      <text:list text:style-name="L2">
        <text:list-item>
          <text:p text:style-name="P29"><text:span text:style-name="Strong_20_Emphasis">Local</text:span> : relié à un symbole, construit le signal et la confiance.</text:p>
        </text:list-item>
        <text:list-item>
          <text:p text:style-name="P29"><text:span text:style-name="Strong_20_Emphasis">Global</text:span> : agrège l'information macro, influence les décisions locales.</text:p>
        </text:list-item>
        <text:list-item>
          <text:p text:style-name="P29"><text:span text:style-name="Strong_20_Emphasis">Fonctions clés</text:span> :</text:p>
          <text:list>
            <text:list-item>
              <text:p text:style-name="P29"><text:span text:style-name="Source_20_Text">observe()</text:span> pour intégrer de nouvelles opinions.</text:p>
            </text:list-item>
            <text:list-item>
              <text:p text:style-name="P29"><text:span text:style-name="Source_20_Text">mutateScenario()</text:span> pour ajuster le signal et la confiance.</text:p>
            </text:list-item>
            <text:list-item>
              <text:p text:style-name="P29"><text:span text:style-name="Source_20_Text">enrichFrom()</text:span> pour combiner scénarios globaux.</text:p>
            </text:list-item>
            <text:list-item>
              <text:p text:style-name="P29"><text:soft-page-break/><text:span text:style-name="Source_20_Text">proposeIntent()</text:span> pour fournir des candidatures à la décision.</text:p>
            </text:list-item>
          </text:list>
        </text:list-item>
        <text:list-item>
          <text:p text:style-name="P29"><text:span text:style-name="Strong_20_Emphasis">Historisation</text:span> : chaque changement d'état est logué dans un historique interne.</text:p>
        </text:list-item>
      </text:list>
      <text:h text:style-name="P28" text:outline-level="4">b) DecisionCandidate</text:h>
      <text:list text:style-name="L3">
        <text:list-item>
          <text:p text:style-name="P30">Objet intermédiaire léger créé par un scénario validé.</text:p>
        </text:list-item>
        <text:list-item>
          <text:p text:style-name="P30">Contient la référence au scénario local, snapshots globaux et contexte complet.</text:p>
        </text:list-item>
        <text:list-item>
          <text:p text:style-name="P30">Sert de base pour le DecisionEngine.</text:p>
        </text:list-item>
      </text:list>
      <text:h text:style-name="P28" text:outline-level="4">c) DecisionEngine</text:h>
      <text:list text:style-name="L4">
        <text:list-item>
          <text:p text:style-name="P31">Transforme les candidats en Decisions effectives.</text:p>
        </text:list-item>
        <text:list-item>
          <text:p text:style-name="P31">Applique filtres, priorisation, et contexte d’exécution (Exchange vs Wallet non-custodial).</text:p>
        </text:list-item>
        <text:list-item>
          <text:p text:style-name="P31">Peut combiner plusieurs candidats dans une <text:span text:style-name="Strong_20_Emphasis">Decision composite</text:span>.</text:p>
        </text:list-item>
      </text:list>
      <text:h text:style-name="P28" text:outline-level="4">d) Decision</text:h>
      <text:list text:style-name="L5">
        <text:list-item>
          <text:p text:style-name="P32"><text:span text:style-name="Strong_20_Emphasis">Composite de ActionStep(s)</text:span>, correspondant à un engagement réel sur le marché.</text:p>
        </text:list-item>
        <text:list-item>
          <text:p text:style-name="P32"><text:span text:style-name="Strong_20_Emphasis">Lifecycle</text:span> : CREATED → EXECUTED → OBSERVING → CLOSED (ou ABORTED/EXPIRED).</text:p>
        </text:list-item>
        <text:list-item>
          <text:p text:style-name="P32"><text:span text:style-name="Strong_20_Emphasis">Traçabilité complète</text:span> : garde la référence aux scénarios locaux et globaux qui l’ont influencée, snapshots d’indicateurs, contexte d’exécution.</text:p>
        </text:list-item>
        <text:list-item>
          <text:p text:style-name="P32"><text:span text:style-name="Strong_20_Emphasis">Règle clé</text:span> : une décision est toujours rattachée à un symbol/portefeuille.</text:p>
        </text:list-item>
      </text:list>
      <text:h text:style-name="P28" text:outline-level="4">e) ActionStep</text:h>
      <text:list text:style-name="L6">
        <text:list-item>
          <text:p text:style-name="P33">Unité d’exécution concrète : BUY, SELL, HOLD, EXIT.</text:p>
        </text:list-item>
        <text:list-item>
          <text:p text:style-name="P33">Paramétrable avec seuils et conditions.</text:p>
        </text:list-item>
        <text:list-item>
          <text:p text:style-name="P33">Traçable individuellement pour évaluation fine.</text:p>
        </text:list-item>
      </text:list>
      <text:h text:style-name="P28" text:outline-level="4">f) DecisionMonitor / DecisionEvaluation</text:h>
      <text:list text:style-name="L7">
        <text:list-item>
          <text:p text:style-name="P34">Suit les décisions exécutées dans le temps.</text:p>
        </text:list-item>
        <text:list-item>
          <text:p text:style-name="P34"><text:span text:style-name="Strong_20_Emphasis">Métriques</text:span> :</text:p>
          <text:list>
            <text:list-item>
              <text:p text:style-name="P34">PnL réalisé et latent</text:p>
            </text:list-item>
            <text:list-item>
              <text:p text:style-name="P34">Durée de vie et temps jusqu’au profit/perte</text:p>
            </text:list-item>
            <text:list-item>
              <text:p text:style-name="P34">Drawdown maximum</text:p>
            </text:list-item>
            <text:list-item>
              <text:p text:style-name="P34">Volatilité sur la période</text:p>
            </text:list-item>
            <text:list-item>
              <text:p text:style-name="P34"><text:soft-page-break/>Frais et ratio gain/risque</text:p>
            </text:list-item>
          </text:list>
        </text:list-item>
        <text:list-item>
          <text:p text:style-name="P34">Permet la <text:span text:style-name="Strong_20_Emphasis">traçabilité complète</text:span> depuis la justification initiale jusqu’au résultat.</text:p>
        </text:list-item>
        <text:list-item>
          <text:p text:style-name="P34">Compatible avec backtesting pour reproduire exactement le comportement historique.</text:p>
        </text:list-item>
      </text:list>
      <text:p text:style-name="P23"/>
      <text:h text:style-name="P24" text:outline-level="2">3. Principes d’architecture</text:h>
      <text:list text:style-name="L8">
        <text:list-item>
          <text:p text:style-name="P35"><text:span text:style-name="Strong_20_Emphasis">Séparation claire</text:span> :</text:p>
          <text:list>
            <text:list-item>
              <text:p text:style-name="P35">Scénarios = producteurs de contexte et signaux</text:p>
            </text:list-item>
            <text:list-item>
              <text:p text:style-name="P35">Decisions = consommateurs, responsables des actions</text:p>
            </text:list-item>
            <text:list-item>
              <text:p text:style-name="P35">Evaluation = couche transverse, indépendante de l’exécution</text:p>
            </text:list-item>
          </text:list>
        </text:list-item>
        <text:list-item>
          <text:p text:style-name="P35"><text:span text:style-name="Strong_20_Emphasis">Décision composite par défaut</text:span> :</text:p>
          <text:list>
            <text:list-item>
              <text:p text:style-name="P35">Facilite le DCA intelligent ++</text:p>
            </text:list-item>
            <text:list-item>
              <text:p text:style-name="P35">Permet de simuler des comportements atomiques via ActionSteps</text:p>
            </text:list-item>
          </text:list>
        </text:list-item>
        <text:list-item>
          <text:p text:style-name="P35"><text:span text:style-name="Strong_20_Emphasis">Traçabilité totale</text:span> :</text:p>
          <text:list>
            <text:list-item>
              <text:p text:style-name="P35">Chaque Decision conserve les scénarios et indicateurs qui l’ont influencée</text:p>
            </text:list-item>
            <text:list-item>
              <text:p text:style-name="P35">Historisation des changements de scénario</text:p>
            </text:list-item>
            <text:list-item>
              <text:p text:style-name="P35">Historisation des actions et métriques</text:p>
            </text:list-item>
          </text:list>
        </text:list-item>
        <text:list-item>
          <text:p text:style-name="P35"><text:span text:style-name="Strong_20_Emphasis">Influence des Global Scenarios</text:span> :</text:p>
          <text:list>
            <text:list-item>
              <text:p text:style-name="P35">Ne créent jamais de Decision seules</text:p>
            </text:list-item>
            <text:list-item>
              <text:p text:style-name="P35">Ajustent la priorisation, le sizing et la fréquence des décisions locales</text:p>
            </text:list-item>
          </text:list>
        </text:list-item>
        <text:list-item>
          <text:p text:style-name="P35"><text:span text:style-name="Strong_20_Emphasis">Evaluation post-exécution</text:span> :</text:p>
          <text:list>
            <text:list-item>
              <text:p text:style-name="P35">Repose sur métriques financières et temporelles</text:p>
            </text:list-item>
            <text:list-item>
              <text:p text:style-name="P35">Permet analyse qualitative et quantitative</text:p>
            </text:list-item>
            <text:list-item>
              <text:p text:style-name="P35">S’intègre au backtesting</text:p>
            </text:list-item>
          </text:list>
        </text:list-item>
        <text:list-item>
          <text:p text:style-name="P35"><text:span text:style-name="Strong_20_Emphasis">Extensibilité</text:span> :</text:p>
          <text:list>
            <text:list-item>
              <text:p text:style-name="P35">Facile d’ajouter de nouvelles métriques (ex : MFE/MAE)</text:p>
            </text:list-item>
            <text:list-item>
              <text:p text:style-name="P35">Décisions et scénarios peuvent évoluer indépendamment</text:p>
            </text:list-item>
          </text:list>
        </text:list-item>
      </text:list>
      <text:p text:style-name="P23"/>
      <text:h text:style-name="P24" text:outline-level="2">4. Schéma conceptuel (simplifié)</text:h>
      <text:p text:style-name="P27"><text:span text:style-name="Source_20_Text"><text:s text:c="21"/>┌────────────────────┐</text:span></text:p>
      <text:p text:style-name="P27"><text:soft-page-break/><text:span text:style-name="Source_20_Text"><text:s text:c="21"/>│ <text:s text:c="3"/>Market Data <text:s text:c="4"/>│</text:span></text:p>
      <text:p text:style-name="P27"><text:span text:style-name="Source_20_Text"><text:s text:c="21"/>└────────┬───────────┘</text:span></text:p>
      <text:p text:style-name="P27"><text:span text:style-name="Source_20_Text"><text:s text:c="30"/>│</text:span></text:p>
      <text:p text:style-name="P27"><text:span text:style-name="Source_20_Text"><text:s text:c="30"/>▼</text:span></text:p>
      <text:p text:style-name="P27"><text:span text:style-name="Source_20_Text"><text:s text:c="21"/>┌────────────────────┐</text:span></text:p>
      <text:p text:style-name="P27"><text:span text:style-name="Source_20_Text"><text:s text:c="21"/>│ <text:s text:c="2"/>Market Opinion <text:s text:c="2"/>│</text:span></text:p>
      <text:p text:style-name="P27"><text:span text:style-name="Source_20_Text"><text:s text:c="21"/>└────────┬───────────┘</text:span></text:p>
      <text:p text:style-name="P27"><text:span text:style-name="Source_20_Text"><text:s text:c="30"/>│</text:span></text:p>
      <text:p text:style-name="P27"><text:span text:style-name="Source_20_Text"><text:s text:c="30"/>▼</text:span></text:p>
      <text:p text:style-name="P27"><text:span text:style-name="Source_20_Text"><text:s text:c="21"/>┌────────────────────┐</text:span></text:p>
      <text:p text:style-name="P27"><text:span text:style-name="Source_20_Text"><text:s text:c="21"/>│ <text:s text:c="2"/>ScenarioEngine <text:s text:c="2"/>│</text:span></text:p>
      <text:p text:style-name="P27"><text:span text:style-name="Source_20_Text"><text:s text:c="21"/>└────────┬───────────┘</text:span></text:p>
      <text:p text:style-name="P27"><text:span text:style-name="Source_20_Text"><text:s text:c="10"/>┌───────────────────┴───────────────────┐</text:span></text:p>
      <text:p text:style-name="P27"><text:span text:style-name="Source_20_Text"><text:s text:c="10"/>│ <text:s text:c="38"/>│</text:span></text:p>
      <text:p text:style-name="P27"><text:span text:style-name="Source_20_Text"><text:s text:c="10"/>▼ <text:s text:c="38"/>▼</text:span></text:p>
      <text:p text:style-name="P27"><text:span text:style-name="Source_20_Text">┌────────────────────┐ <text:s text:c="16"/>┌────────────────────┐</text:span></text:p>
      <text:p text:style-name="P27"><text:span text:style-name="Source_20_Text">│ Local MarketScenario│ <text:s text:c="16"/>│ Global MarketScenario│</text:span></text:p>
      <text:p text:style-name="P27"><text:span text:style-name="Source_20_Text">└─────────┬──────────┘ <text:s text:c="16"/>└────────────────────┘</text:span></text:p>
      <text:p text:style-name="P27"><text:span text:style-name="Source_20_Text"><text:s text:c="10"/>│ (VALIDATED)</text:span></text:p>
      <text:p text:style-name="P27"><text:span text:style-name="Source_20_Text"><text:s text:c="10"/>▼</text:span></text:p>
      <text:p text:style-name="P27"><text:span text:style-name="Source_20_Text"><text:s/>┌───────────────────────────────┐</text:span></text:p>
      <text:p text:style-name="P27"><text:span text:style-name="Source_20_Text"><text:s/>│ <text:s text:c="5"/>DecisionCandidate <text:s text:c="7"/>│</text:span></text:p>
      <text:p text:style-name="P27"><text:span text:style-name="Source_20_Text"><text:s/>└─────────┬─────────────────────┘</text:span></text:p>
      <text:p text:style-name="P27"><text:span text:style-name="Source_20_Text"><text:s text:c="11"/>│</text:span></text:p>
      <text:p text:style-name="P27"><text:span text:style-name="Source_20_Text"><text:s text:c="11"/>▼</text:span></text:p>
      <text:p text:style-name="P27"><text:span text:style-name="Source_20_Text"><text:s/>┌───────────────────────────────┐</text:span></text:p>
      <text:p text:style-name="P27"><text:span text:style-name="Source_20_Text"><text:s/>│ <text:s text:c="7"/>DecisionEngine <text:s text:c="8"/>│</text:span></text:p>
      <text:p text:style-name="P27"><text:span text:style-name="Source_20_Text"><text:s/>└─────────┬─────────────────────┘</text:span></text:p>
      <text:p text:style-name="P27"><text:span text:style-name="Source_20_Text"><text:s text:c="11"/>│</text:span></text:p>
      <text:p text:style-name="P27"><text:span text:style-name="Source_20_Text"><text:s text:c="11"/>▼</text:span></text:p>
      <text:p text:style-name="P27"><text:span text:style-name="Source_20_Text"><text:s/>┌───────────────────────────────┐</text:span></text:p>
      <text:p text:style-name="P27"><text:span text:style-name="Source_20_Text"><text:s/>│ <text:s text:c="10"/>Decision <text:s text:c="11"/>│</text:span></text:p>
      <text:p text:style-name="P27"><text:soft-page-break/><text:span text:style-name="Source_20_Text"><text:s/>└─────────┬─────────────────────┘</text:span></text:p>
      <text:p text:style-name="P27"><text:span text:style-name="Source_20_Text"><text:s text:c="11"/>│</text:span></text:p>
      <text:p text:style-name="P27"><text:span text:style-name="Source_20_Text"><text:s text:c="11"/>▼</text:span></text:p>
      <text:p text:style-name="P27"><text:span text:style-name="Source_20_Text"><text:s/>┌───────────────────────────────┐</text:span></text:p>
      <text:p text:style-name="P27"><text:span text:style-name="Source_20_Text"><text:s/>│ <text:s text:c="8"/>ActionStep(s) <text:s text:c="8"/>│</text:span></text:p>
      <text:p text:style-name="P27"><text:span text:style-name="Source_20_Text"><text:s/>└─────────┬─────────────────────┘</text:span></text:p>
      <text:p text:style-name="P27"><text:span text:style-name="Source_20_Text"><text:s text:c="11"/>│</text:span></text:p>
      <text:p text:style-name="P27"><text:span text:style-name="Source_20_Text"><text:s text:c="11"/>▼</text:span></text:p>
      <text:p text:style-name="P27"><text:span text:style-name="Source_20_Text"><text:s/>┌───────────────────────────────┐</text:span></text:p>
      <text:p text:style-name="P27"><text:span text:style-name="Source_20_Text"><text:s/>│ DecisionMonitor / Evaluation <text:s/>│</text:span></text:p>
      <text:p text:style-name="P27"><text:span text:style-name="Source_20_Text"><text:s/>└───────────────────────────────┘</text:span></text:p>
      <text:p text:style-name="P23"/>
      <text:p text:style-name="Text_20_body"><text:span text:style-name="Strong_20_Emphasis">Note</text:span> : ce rapport peut servir de base pour implémenter les interfaces Java, les abstracts et les classes concrètes, tout en maintenant une traçabilité complète et un pipeline d’évaluation robust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cm" fo:margin-bottom="0.141cm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847cm" fo:margin-right="0.847cm" fo:margin-top="0.176cm" fo:margin-bottom="0.176cm" style:contextual-spacing="false" fo:text-indent="0cm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.141cm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Aptos1" style:font-family-asian="Aptos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Symbol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7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8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9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0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1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2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3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4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5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6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7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8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3T23:47:02</meta:creation-date>
    <dc:date>2026-02-04T02:20:03.709285500</dc:date>
    <meta:generator>LibreOffice/25.2.7.2$Windows_X86_64 LibreOffice_project/5cbfd1ab6520636bb5f7b99185aa69bd7456825d</meta:generator>
    <meta:editing-duration>PT13M59S</meta:editing-duration>
    <meta:editing-cycles>2</meta:editing-cycles>
    <meta:document-statistic meta:table-count="0" meta:image-count="0" meta:object-count="0" meta:page-count="10" meta:paragraph-count="246" meta:word-count="1431" meta:character-count="10234" meta:non-whitespace-character-count="8350"/>
    <meta:user-defined meta:name="AppVersion">12.0000</meta:user-defined>
    <meta:template xlink:type="simple" xlink:actuate="onRequest" xlink:title="Normal.dotm" xlink:href=""/>
  </office:meta>
</office:document-meta>
</file>